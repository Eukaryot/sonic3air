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C0000001C0DB8B4337.png" manifest:media-type="image/png"/>
  <manifest:file-entry manifest:full-path="Pictures/10000000000005B300000230EA6B3CD4.png" manifest:media-type="image/png"/>
  <manifest:file-entry manifest:full-path="Pictures/10000001000002F600000085EB31024A.png" manifest:media-type="image/png"/>
  <manifest:file-entry manifest:full-path="Pictures/100000010000033E0000010C878628DE.png" manifest:media-type="image/png"/>
  <manifest:file-entry manifest:full-path="Pictures/1000000000000190000000E099CF58F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list-style-name="L1">
      <style:text-properties fo:font-size="11pt" style:font-size-asian="11pt" style:font-size-complex="11pt"/>
    </style:style>
    <style:style style:name="P7"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8" style:family="paragraph" style:parent-style-name="Standard">
      <style:paragraph-properties fo:padding="0.212cm" fo:border="0.26pt dotted #000000" style:shadow="none"/>
      <style:text-properties fo:font-style="italic" style:font-style-asian="italic" style:font-style-complex="italic"/>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text-properties officeooo:rsid="001a88b8" officeooo:paragraph-rsid="001a88b8"/>
    </style:style>
    <style:style style:name="P14" style:family="paragraph" style:parent-style-name="Standard" style:list-style-name="L2">
      <style:text-properties officeooo:paragraph-rsid="00cb10d0"/>
    </style:style>
    <style:style style:name="P15" style:family="paragraph" style:parent-style-name="Standard" style:list-style-name="L2">
      <style:text-properties officeooo:paragraph-rsid="001c7e89"/>
    </style:style>
    <style:style style:name="P16" style:family="paragraph" style:parent-style-name="Standard" style:list-style-name="L2">
      <style:text-properties officeooo:paragraph-rsid="001a88b8"/>
    </style:style>
    <style:style style:name="P17" style:family="paragraph" style:parent-style-name="Standard">
      <style:text-properties officeooo:paragraph-rsid="001a88b8"/>
    </style:style>
    <style:style style:name="P18" style:family="paragraph" style:parent-style-name="Heading_20_2" style:list-style-name="">
      <style:paragraph-properties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9" style:family="paragraph" style:parent-style-name="Heading_20_2">
      <style:paragraph-properties fo:break-before="page"/>
    </style:style>
    <style:style style:name="P20" style:family="paragraph" style:parent-style-name="Heading_20_3">
      <style:text-properties officeooo:paragraph-rsid="0021428d"/>
    </style:style>
    <style:style style:name="P21" style:family="paragraph" style:parent-style-name="Standard">
      <style:text-properties fo:font-weight="bold" style:font-weight-asian="bold" style:font-weight-complex="bold"/>
    </style:style>
    <style:style style:name="P22" style:family="paragraph" style:parent-style-name="Standard" style:list-style-name="L3">
      <style:text-properties officeooo:paragraph-rsid="00c328ee"/>
    </style:style>
    <style:style style:name="P23" style:family="paragraph" style:parent-style-name="Standard" style:list-style-name="L3">
      <style:text-properties officeooo:paragraph-rsid="003fa1d4"/>
    </style:style>
    <style:style style:name="P24" style:family="paragraph" style:parent-style-name="Standard">
      <style:text-properties officeooo:paragraph-rsid="001dad61"/>
    </style:style>
    <style:style style:name="P25" style:family="paragraph" style:parent-style-name="Standard">
      <style:text-properties fo:font-weight="bold" officeooo:rsid="0021428d" officeooo:paragraph-rsid="0021428d" style:font-weight-asian="bold" style:font-weight-complex="bold"/>
    </style:style>
    <style:style style:name="P26" style:family="paragraph" style:parent-style-name="Standard" style:list-style-name="L3">
      <style:text-properties officeooo:paragraph-rsid="001dad61"/>
    </style:style>
    <style:style style:name="P27" style:family="paragraph" style:parent-style-name="Standard" style:list-style-name="L4">
      <style:text-properties officeooo:rsid="001dad61" officeooo:paragraph-rsid="001dad61"/>
    </style:style>
    <style:style style:name="P28" style:family="paragraph" style:parent-style-name="Standard" style:list-style-name="L4">
      <style:text-properties officeooo:paragraph-rsid="003b3167"/>
    </style:style>
    <style:style style:name="P29" style:family="paragraph" style:parent-style-name="Standard" style:list-style-name="L4"/>
    <style:style style:name="P30" style:family="paragraph" style:parent-style-name="Standard" style:list-style-name="L5">
      <style:text-properties officeooo:paragraph-rsid="003b3167"/>
    </style:style>
    <style:style style:name="P31" style:family="paragraph" style:parent-style-name="Standard">
      <style:text-properties officeooo:paragraph-rsid="003b3167"/>
    </style:style>
    <style:style style:name="P32" style:family="paragraph" style:parent-style-name="Standard">
      <style:text-properties officeooo:paragraph-rsid="0021428d"/>
    </style:style>
    <style:style style:name="P33" style:family="paragraph" style:parent-style-name="Standard">
      <style:text-properties officeooo:paragraph-rsid="001f7784"/>
    </style:style>
    <style:style style:name="P34" style:family="paragraph" style:parent-style-name="Standard">
      <style:text-properties officeooo:paragraph-rsid="00da82d6"/>
    </style:style>
    <style:style style:name="P35" style:family="paragraph" style:parent-style-name="Standard">
      <style:text-properties officeooo:paragraph-rsid="0022d415"/>
    </style:style>
    <style:style style:name="P36" style:family="paragraph" style:parent-style-name="Standard">
      <style:text-properties officeooo:paragraph-rsid="0021428d" fo:background-color="#ffffff"/>
    </style:style>
    <style:style style:name="P37" style:family="paragraph" style:parent-style-name="Standard" style:list-style-name="L6">
      <style:text-properties officeooo:paragraph-rsid="0021428d"/>
    </style:style>
    <style:style style:name="P38" style:family="paragraph" style:parent-style-name="Standard">
      <style:paragraph-properties fo:padding="0.212cm" fo:border="0.26pt dotted #000000" style:shadow="none"/>
      <style:text-properties officeooo:paragraph-rsid="0021428d"/>
    </style:style>
    <style:style style:name="P39" style:family="paragraph" style:parent-style-name="Standard">
      <style:text-properties fo:font-style="italic" officeooo:paragraph-rsid="0021428d" style:font-style-asian="italic" style:font-style-complex="italic"/>
    </style:style>
    <style:style style:name="P40" style:family="paragraph" style:parent-style-name="Heading_20_3">
      <style:text-properties officeooo:paragraph-rsid="0022d415"/>
    </style:style>
    <style:style style:name="P41" style:family="paragraph" style:parent-style-name="Standard">
      <style:text-properties fo:font-style="italic" officeooo:paragraph-rsid="0022d415" style:font-style-asian="italic" style:font-style-complex="italic"/>
    </style:style>
    <style:style style:name="P42" style:family="paragraph" style:parent-style-name="Standard" style:list-style-name="L7">
      <style:text-properties officeooo:paragraph-rsid="001dad61"/>
    </style:style>
    <style:style style:name="P43" style:family="paragraph" style:parent-style-name="Standard">
      <style:text-properties style:font-name="Arial" officeooo:paragraph-rsid="001dad61"/>
    </style:style>
    <style:style style:name="P44" style:family="paragraph" style:parent-style-name="Heading_20_2">
      <style:text-properties officeooo:paragraph-rsid="006afbaa"/>
    </style:style>
    <style:style style:name="P45" style:family="paragraph" style:parent-style-name="Heading_20_3">
      <style:text-properties officeooo:paragraph-rsid="006afbaa"/>
    </style:style>
    <style:style style:name="P46" style:family="paragraph" style:parent-style-name="Normal">
      <style:text-properties officeooo:paragraph-rsid="006afbaa"/>
    </style:style>
    <style:style style:name="P47" style:family="paragraph" style:parent-style-name="Standard">
      <style:text-properties fo:font-weight="bold" officeooo:paragraph-rsid="006afbaa" style:font-weight-asian="bold" style:font-weight-complex="bold"/>
    </style:style>
    <style:style style:name="P48" style:family="paragraph" style:parent-style-name="Standard" style:list-style-name="L8">
      <style:text-properties officeooo:paragraph-rsid="006afbaa"/>
    </style:style>
    <style:style style:name="P49" style:family="paragraph" style:parent-style-name="Standard">
      <style:text-properties officeooo:paragraph-rsid="006afbaa"/>
    </style:style>
    <style:style style:name="P50" style:family="paragraph" style:parent-style-name="Standard" style:list-style-name="L9">
      <style:text-properties officeooo:rsid="001dad61" officeooo:paragraph-rsid="006afbaa"/>
    </style:style>
    <style:style style:name="P51" style:family="paragraph" style:parent-style-name="Standard" style:list-style-name="L9">
      <style:text-properties officeooo:paragraph-rsid="006afbaa"/>
    </style:style>
    <style:style style:name="P52" style:family="paragraph" style:parent-style-name="Standard" style:list-style-name="L10">
      <style:text-properties officeooo:paragraph-rsid="006afbaa"/>
    </style:style>
    <style:style style:name="P53" style:family="paragraph" style:parent-style-name="Standard">
      <style:text-properties officeooo:rsid="001dad61" officeooo:paragraph-rsid="006afbaa"/>
    </style:style>
    <style:style style:name="P54" style:family="paragraph" style:parent-style-name="Standard">
      <style:text-properties officeooo:paragraph-rsid="006afbaa" fo:background-color="#ffffff"/>
    </style:style>
    <style:style style:name="P55" style:family="paragraph" style:parent-style-name="Standard" style:list-style-name="L11">
      <style:text-properties officeooo:paragraph-rsid="006afbaa"/>
    </style:style>
    <style:style style:name="P56" style:family="paragraph" style:parent-style-name="Standard">
      <style:text-properties fo:font-style="italic" officeooo:paragraph-rsid="006afbaa" style:font-style-asian="italic" style:font-style-complex="italic"/>
    </style:style>
    <style:style style:name="P57" style:family="paragraph" style:parent-style-name="Standard" style:list-style-name="L12">
      <style:text-properties officeooo:paragraph-rsid="006afbaa"/>
    </style:style>
    <style:style style:name="P58"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59" style:family="paragraph" style:parent-style-name="Heading_20_3">
      <style:text-properties officeooo:paragraph-rsid="00247d8e"/>
    </style:style>
    <style:style style:name="P60" style:family="paragraph" style:parent-style-name="Standard">
      <style:text-properties fo:font-weight="bold" officeooo:paragraph-rsid="00247d8e" style:font-weight-asian="bold" style:font-weight-complex="bold"/>
    </style:style>
    <style:style style:name="P61" style:family="paragraph" style:parent-style-name="Standard" style:list-style-name="L3">
      <style:text-properties officeooo:paragraph-rsid="00247d8e"/>
    </style:style>
    <style:style style:name="P62" style:family="paragraph" style:parent-style-name="Standard">
      <style:text-properties officeooo:paragraph-rsid="00247d8e"/>
    </style:style>
    <style:style style:name="P63" style:family="paragraph" style:parent-style-name="Standard">
      <style:text-properties fo:font-weight="bold" officeooo:rsid="0021428d" officeooo:paragraph-rsid="00247d8e" style:font-weight-asian="bold" style:font-weight-complex="bold"/>
    </style:style>
    <style:style style:name="P64" style:family="paragraph" style:parent-style-name="Standard">
      <style:text-properties officeooo:paragraph-rsid="00425683"/>
    </style:style>
    <style:style style:name="P65" style:family="paragraph" style:parent-style-name="Standard" style:list-style-name="L4">
      <style:text-properties officeooo:rsid="001dad61" officeooo:paragraph-rsid="00425683"/>
    </style:style>
    <style:style style:name="P66" style:family="paragraph" style:parent-style-name="Standard" style:list-style-name="L4">
      <style:text-properties officeooo:paragraph-rsid="00425683"/>
    </style:style>
    <style:style style:name="P67" style:family="paragraph" style:parent-style-name="Standard" style:list-style-name="L13">
      <style:text-properties officeooo:paragraph-rsid="00425683"/>
    </style:style>
    <style:style style:name="P68" style:family="paragraph" style:parent-style-name="Standard">
      <style:text-properties officeooo:rsid="001dad61" officeooo:paragraph-rsid="00425683"/>
    </style:style>
    <style:style style:name="P69" style:family="paragraph" style:parent-style-name="Heading_20_3">
      <style:text-properties officeooo:paragraph-rsid="00266cc9"/>
    </style:style>
    <style:style style:name="P70" style:family="paragraph" style:parent-style-name="Standard">
      <style:text-properties officeooo:paragraph-rsid="00266cc9"/>
    </style:style>
    <style:style style:name="P71" style:family="paragraph" style:parent-style-name="Standard">
      <style:text-properties officeooo:paragraph-rsid="00247d8e" fo:background-color="#ffffff"/>
    </style:style>
    <style:style style:name="P72" style:family="paragraph" style:parent-style-name="Standard" style:list-style-name="L14">
      <style:text-properties officeooo:paragraph-rsid="0027a4b6"/>
    </style:style>
    <style:style style:name="P73" style:family="paragraph" style:parent-style-name="Standard" style:list-style-name="L14"/>
    <style:style style:name="P74" style:family="paragraph" style:parent-style-name="Standard" style:list-style-name="L14">
      <style:text-properties officeooo:paragraph-rsid="00cf607e"/>
    </style:style>
    <style:style style:name="P75" style:family="paragraph" style:parent-style-name="Standard">
      <style:paragraph-properties fo:padding="0.212cm" fo:border="0.26pt dotted #000000" style:shadow="none"/>
      <style:text-properties officeooo:paragraph-rsid="00247d8e"/>
    </style:style>
    <style:style style:name="P76" style:family="paragraph" style:parent-style-name="Standard">
      <style:paragraph-properties fo:padding="0.212cm" fo:border="0.26pt dotted #000000" style:shadow="none"/>
      <style:text-properties officeooo:paragraph-rsid="00295b98"/>
    </style:style>
    <style:style style:name="P77" style:family="paragraph" style:parent-style-name="Standard">
      <style:text-properties fo:font-style="italic" officeooo:paragraph-rsid="00ce1f96" style:font-style-asian="italic" style:font-style-complex="italic"/>
    </style:style>
    <style:style style:name="P78" style:family="paragraph" style:parent-style-name="Standard">
      <style:text-properties fo:font-style="italic" officeooo:paragraph-rsid="00247d8e" style:font-style-asian="italic" style:font-style-complex="italic"/>
    </style:style>
    <style:style style:name="P79" style:family="paragraph" style:parent-style-name="Standard" style:list-style-name="L15">
      <style:text-properties officeooo:paragraph-rsid="00247d8e"/>
    </style:style>
    <style:style style:name="P80" style:family="paragraph" style:parent-style-name="Heading_20_2" style:list-style-name="">
      <style:paragraph-properties fo:line-height="115%" fo:hyphenation-ladder-count="no-limit" fo:hyphenation-keep="auto" loext:hyphenation-keep-type="column" loext:hyphenation-keep-line="fals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81"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82" style:family="paragraph" style:parent-style-name="Heading_20_3">
      <style:text-properties officeooo:paragraph-rsid="0038a373"/>
    </style:style>
    <style:style style:name="P83" style:family="paragraph" style:parent-style-name="Standard">
      <style:text-properties fo:font-weight="bold" officeooo:paragraph-rsid="0038a373" style:font-weight-asian="bold" style:font-weight-complex="bold"/>
    </style:style>
    <style:style style:name="P84" style:family="paragraph" style:parent-style-name="Standard" style:list-style-name="L3">
      <style:text-properties officeooo:paragraph-rsid="0038a373"/>
    </style:style>
    <style:style style:name="P85" style:family="paragraph" style:parent-style-name="Standard">
      <style:text-properties officeooo:paragraph-rsid="0038a373"/>
    </style:style>
    <style:style style:name="P86" style:family="paragraph" style:parent-style-name="Standard">
      <style:text-properties fo:font-weight="bold" officeooo:rsid="0021428d" officeooo:paragraph-rsid="0038a373" style:font-weight-asian="bold" style:font-weight-complex="bold"/>
    </style:style>
    <style:style style:name="P87" style:family="paragraph" style:parent-style-name="Standard" style:list-style-name="L3">
      <style:text-properties officeooo:paragraph-rsid="003a0175"/>
    </style:style>
    <style:style style:name="P88" style:family="paragraph" style:parent-style-name="Standard">
      <style:text-properties officeooo:paragraph-rsid="004a9743"/>
    </style:style>
    <style:style style:name="P89" style:family="paragraph" style:parent-style-name="Standard" style:list-style-name="L16">
      <style:text-properties officeooo:paragraph-rsid="004a9743"/>
    </style:style>
    <style:style style:name="P90" style:family="paragraph" style:parent-style-name="Standard" style:list-style-name="L16">
      <style:text-properties officeooo:paragraph-rsid="004b0ff7"/>
    </style:style>
    <style:style style:name="P91" style:family="paragraph" style:parent-style-name="Standard" style:list-style-name="L16">
      <style:text-properties officeooo:paragraph-rsid="004c9798"/>
    </style:style>
    <style:style style:name="P92" style:family="paragraph" style:parent-style-name="Standard" style:list-style-name="L16">
      <style:text-properties officeooo:paragraph-rsid="005759b8"/>
    </style:style>
    <style:style style:name="P93" style:family="paragraph" style:parent-style-name="Standard">
      <style:text-properties officeooo:rsid="001dad61" officeooo:paragraph-rsid="004867d0"/>
    </style:style>
    <style:style style:name="P94" style:family="paragraph" style:parent-style-name="Standard">
      <style:text-properties officeooo:paragraph-rsid="0111fd5f"/>
    </style:style>
    <style:style style:name="P95" style:family="paragraph" style:parent-style-name="Standard">
      <style:text-properties officeooo:paragraph-rsid="0051203a"/>
    </style:style>
    <style:style style:name="P96" style:family="paragraph" style:parent-style-name="Standard">
      <style:text-properties officeooo:paragraph-rsid="0113cc2d"/>
    </style:style>
    <style:style style:name="P97"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98" style:family="paragraph" style:parent-style-name="Standard">
      <style:text-properties officeooo:paragraph-rsid="00547e01"/>
    </style:style>
    <style:style style:name="P99" style:family="paragraph" style:parent-style-name="Standard">
      <style:text-properties fo:font-style="italic" officeooo:paragraph-rsid="0038a373" style:font-style-asian="italic" style:font-style-complex="italic"/>
    </style:style>
    <style:style style:name="P100" style:family="paragraph" style:parent-style-name="Heading_20_2">
      <style:text-properties officeooo:paragraph-rsid="006b5f58"/>
    </style:style>
    <style:style style:name="P101" style:family="paragraph" style:parent-style-name="Heading_20_3">
      <style:text-properties officeooo:paragraph-rsid="006b5f58"/>
    </style:style>
    <style:style style:name="P102" style:family="paragraph" style:parent-style-name="Standard">
      <style:text-properties fo:font-weight="bold" officeooo:paragraph-rsid="006b5f58" style:font-weight-asian="bold" style:font-weight-complex="bold"/>
    </style:style>
    <style:style style:name="P103" style:family="paragraph" style:parent-style-name="Standard" style:list-style-name="L8">
      <style:text-properties officeooo:paragraph-rsid="006b5f58"/>
    </style:style>
    <style:style style:name="P104" style:family="paragraph" style:parent-style-name="Standard">
      <style:text-properties officeooo:paragraph-rsid="006b5f58"/>
    </style:style>
    <style:style style:name="P105"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06"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07"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108" style:family="paragraph" style:parent-style-name="Standard" style:list-style-name="L17">
      <style:text-properties officeooo:paragraph-rsid="006b5f58"/>
    </style:style>
    <style:style style:name="P109" style:family="paragraph" style:parent-style-name="Standard">
      <style:text-properties officeooo:rsid="001dad61" officeooo:paragraph-rsid="006b5f58"/>
    </style:style>
    <style:style style:name="P110"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111" style:family="paragraph" style:parent-style-name="Heading_20_2" style:list-style-name="">
      <style:paragraph-properties fo:line-height="115%" fo:hyphenation-ladder-count="no-limit" fo:hyphenation-keep="auto" loext:hyphenation-keep-type="column" loext:hyphenation-keep-line="false"/>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112"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13" style:family="paragraph" style:parent-style-name="Heading_20_3">
      <style:text-properties officeooo:paragraph-rsid="002b4a7d"/>
    </style:style>
    <style:style style:name="P114" style:family="paragraph" style:parent-style-name="Standard">
      <style:text-properties fo:font-weight="bold" officeooo:paragraph-rsid="002b4a7d" style:font-weight-asian="bold" style:font-weight-complex="bold"/>
    </style:style>
    <style:style style:name="P115" style:family="paragraph" style:parent-style-name="Standard" style:list-style-name="L3">
      <style:text-properties officeooo:paragraph-rsid="002ca092"/>
    </style:style>
    <style:style style:name="P116" style:family="paragraph" style:parent-style-name="Standard">
      <style:text-properties officeooo:paragraph-rsid="002b4a7d"/>
    </style:style>
    <style:style style:name="P117" style:family="paragraph" style:parent-style-name="Standard">
      <style:text-properties fo:font-weight="bold" officeooo:rsid="0021428d" officeooo:paragraph-rsid="002ca092" style:font-weight-asian="bold" style:font-weight-complex="bold"/>
    </style:style>
    <style:style style:name="P118" style:family="paragraph" style:parent-style-name="Standard" style:list-style-name="L18">
      <style:text-properties style:font-name="Verdana" officeooo:paragraph-rsid="002ca092"/>
    </style:style>
    <style:style style:name="P119" style:family="paragraph" style:parent-style-name="Standard" style:list-style-name="L18">
      <style:text-properties officeooo:paragraph-rsid="002ca092"/>
    </style:style>
    <style:style style:name="P120"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121" style:family="paragraph" style:parent-style-name="Standard" style:list-style-name="L19">
      <style:text-properties style:font-name="Verdana" fo:font-size="9.5pt" officeooo:paragraph-rsid="002e1bd4" style:font-name-asian="Verdana" style:font-size-asian="9.5pt" style:font-name-complex="Verdana" style:font-size-complex="9.5pt"/>
    </style:style>
    <style:style style:name="P122" style:family="paragraph" style:parent-style-name="Standard" style:list-style-name="L19">
      <style:text-properties officeooo:paragraph-rsid="002e1bd4"/>
    </style:style>
    <style:style style:name="P123" style:family="paragraph" style:parent-style-name="Standard">
      <style:text-properties officeooo:rsid="001dad61" officeooo:paragraph-rsid="002b4a7d"/>
    </style:style>
    <style:style style:name="P124" style:family="paragraph" style:parent-style-name="Heading_20_3">
      <style:text-properties officeooo:paragraph-rsid="0031e482"/>
    </style:style>
    <style:style style:name="P125"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26" style:family="paragraph" style:parent-style-name="Standard">
      <style:paragraph-properties fo:margin-left="0.635cm" fo:margin-right="0cm" fo:text-indent="0cm" style:auto-text-indent="false">
        <style:tab-stops/>
      </style:paragraph-properties>
      <style:text-properties officeooo:paragraph-rsid="0031e482"/>
    </style:style>
    <style:style style:name="P127" style:family="paragraph" style:parent-style-name="Standard">
      <style:text-properties officeooo:paragraph-rsid="0032d5b4"/>
    </style:style>
    <style:style style:name="P128" style:family="paragraph" style:parent-style-name="Standard">
      <style:text-properties officeooo:paragraph-rsid="002d6179"/>
    </style:style>
    <style:style style:name="P129" style:family="paragraph" style:parent-style-name="Standard">
      <style:text-properties style:font-name="Arial" fo:font-style="italic" officeooo:paragraph-rsid="002b4a7d" style:font-style-asian="italic" style:font-style-complex="italic"/>
    </style:style>
    <style:style style:name="P130" style:family="paragraph" style:parent-style-name="Standard">
      <style:text-properties fo:font-style="italic" officeooo:paragraph-rsid="001dad61" style:font-style-asian="italic" style:font-style-complex="italic"/>
    </style:style>
    <style:style style:name="P131" style:family="paragraph" style:parent-style-name="Standard" style:list-style-name="L20"/>
    <style:style style:name="P132" style:family="paragraph" style:parent-style-name="Standard" style:list-style-name="L21"/>
    <style:style style:name="P133" style:family="paragraph" style:parent-style-name="Standard" style:list-style-name="L22">
      <style:text-properties officeooo:rsid="00dfc190" officeooo:paragraph-rsid="00dfc190"/>
    </style:style>
    <style:style style:name="P134" style:family="paragraph" style:parent-style-name="Standard" style:list-style-name="L22"/>
    <style:style style:name="P135" style:family="paragraph" style:parent-style-name="Standard" style:list-style-name="L22">
      <style:text-properties officeooo:rsid="009c31dc" officeooo:paragraph-rsid="009c31dc"/>
    </style:style>
    <style:style style:name="P136" style:family="paragraph" style:parent-style-name="Standard" style:list-style-name="L23">
      <style:text-properties fo:font-weight="bold" style:font-weight-asian="bold" style:font-weight-complex="bold"/>
    </style:style>
    <style:style style:name="P137" style:family="paragraph" style:parent-style-name="Standard" style:list-style-name="L23"/>
    <style:style style:name="P13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9" style:family="paragraph" style:parent-style-name="Standard">
      <style:text-properties fo:font-style="italic" officeooo:paragraph-rsid="00b044e2" style:font-style-asian="italic" style:font-style-complex="italic"/>
    </style:style>
    <style:style style:name="P140" style:family="paragraph" style:parent-style-name="Standard" style:list-style-name="L24">
      <style:text-properties fo:font-style="italic" style:font-style-asian="italic" style:font-style-complex="italic"/>
    </style:style>
    <style:style style:name="P141" style:family="paragraph" style:parent-style-name="Standard">
      <style:text-properties fo:font-style="italic" style:font-style-asian="italic" style:font-style-complex="italic"/>
    </style:style>
    <style:style style:name="P142" style:family="paragraph" style:parent-style-name="Standard" style:list-style-name="L25">
      <style:text-properties fo:font-style="italic" style:font-style-asian="italic" style:font-style-complex="italic"/>
    </style:style>
    <style:style style:name="P143" style:family="paragraph" style:parent-style-name="Standard">
      <style:text-properties style:font-name="Consolas" fo:font-size="7pt" style:font-size-asian="7pt" style:font-size-complex="7pt"/>
    </style:style>
    <style:style style:name="P144" style:family="paragraph" style:parent-style-name="Standard" style:list-style-name="L26"/>
    <style:style style:name="P145" style:family="paragraph" style:parent-style-name="Standard" style:list-style-name="L27"/>
    <style:style style:name="P146" style:family="paragraph" style:parent-style-name="Standard" style:list-style-name="L28"/>
    <style:style style:name="P147" style:family="paragraph" style:parent-style-name="Heading_20_2">
      <style:text-properties officeooo:rsid="00e1ced6" officeooo:paragraph-rsid="00e1ced6"/>
    </style:style>
    <style:style style:name="P148" style:family="paragraph" style:parent-style-name="Standard">
      <style:text-properties officeooo:paragraph-rsid="00e1ced6"/>
    </style:style>
    <style:style style:name="P149" style:family="paragraph" style:parent-style-name="Standard">
      <style:text-properties officeooo:rsid="00e1ced6" officeooo:paragraph-rsid="00e1ced6"/>
    </style:style>
    <style:style style:name="P150" style:family="paragraph" style:parent-style-name="Standard">
      <style:text-properties officeooo:rsid="00e1ced6" officeooo:paragraph-rsid="00f74ecc"/>
    </style:style>
    <style:style style:name="P151" style:family="paragraph" style:parent-style-name="Standard">
      <style:text-properties officeooo:rsid="01241b6c" officeooo:paragraph-rsid="01241b6c"/>
    </style:style>
    <style:style style:name="P152" style:family="paragraph" style:parent-style-name="Standard">
      <style:text-properties officeooo:paragraph-rsid="00e3b1d8"/>
    </style:style>
    <style:style style:name="P153" style:family="paragraph" style:parent-style-name="Standard" style:list-style-name="L29">
      <style:text-properties officeooo:paragraph-rsid="00e5df94"/>
    </style:style>
    <style:style style:name="P154" style:family="paragraph" style:parent-style-name="Standard" style:list-style-name="L29">
      <style:text-properties officeooo:paragraph-rsid="00943608"/>
    </style:style>
    <style:style style:name="P155" style:family="paragraph" style:parent-style-name="Standard" style:list-style-name="L29"/>
    <style:style style:name="P156" style:family="paragraph" style:parent-style-name="Standard" style:list-style-name="L29">
      <style:text-properties officeooo:paragraph-rsid="009e5532"/>
    </style:style>
    <style:style style:name="P157" style:family="paragraph" style:parent-style-name="Standard" style:list-style-name="L29">
      <style:text-properties officeooo:paragraph-rsid="0097d004"/>
    </style:style>
    <style:style style:name="P158" style:family="paragraph" style:parent-style-name="Standard" style:list-style-name="L30"/>
    <style:style style:name="P159" style:family="paragraph" style:parent-style-name="Standard">
      <style:text-properties officeooo:paragraph-rsid="000e9932"/>
    </style:style>
    <style:style style:name="P160" style:family="paragraph" style:parent-style-name="Standard" style:list-style-name="L31">
      <style:text-properties officeooo:paragraph-rsid="009d4777"/>
    </style:style>
    <style:style style:name="P161" style:family="paragraph" style:parent-style-name="Standard" style:list-style-name="L32"/>
    <style:style style:name="P162" style:family="paragraph" style:parent-style-name="Standard" style:list-style-name="L33"/>
    <style:style style:name="P163" style:family="paragraph" style:parent-style-name="Standard" style:list-style-name="L34"/>
    <style:style style:name="P164" style:family="paragraph" style:parent-style-name="Standard">
      <style:text-properties officeooo:rsid="00a1df60" officeooo:paragraph-rsid="00a1df60"/>
    </style:style>
    <style:style style:name="P165" style:family="paragraph" style:parent-style-name="Standard" style:list-style-name="L35">
      <style:text-properties officeooo:paragraph-rsid="00a1df60"/>
    </style:style>
    <style:style style:name="P166" style:family="paragraph" style:parent-style-name="Standard" style:list-style-name="L35"/>
    <style:style style:name="P167" style:family="paragraph" style:parent-style-name="Standard" style:list-style-name="L36"/>
    <style:style style:name="P168" style:family="paragraph" style:parent-style-name="Standard" style:list-style-name="L36">
      <style:text-properties officeooo:paragraph-rsid="00a294e6"/>
    </style:style>
    <style:style style:name="P169" style:family="paragraph" style:parent-style-name="Standard" style:list-style-name="L37"/>
    <style:style style:name="P170" style:family="paragraph" style:parent-style-name="Standard" style:list-style-name="L38"/>
    <style:style style:name="P171" style:family="paragraph" style:parent-style-name="Standard" style:list-style-name="L39"/>
    <style:style style:name="P172" style:family="paragraph" style:parent-style-name="Standard" style:list-style-name="L40"/>
    <style:style style:name="P173" style:family="paragraph" style:parent-style-name="Standard" style:list-style-name="L41"/>
    <style:style style:name="P174" style:family="paragraph" style:parent-style-name="Standard" style:list-style-name="L41">
      <style:text-properties officeooo:rsid="000e9932" officeooo:paragraph-rsid="000e9932"/>
    </style:style>
    <style:style style:name="P175" style:family="paragraph" style:parent-style-name="Standard" style:list-style-name="L41">
      <style:text-properties officeooo:rsid="00e78b0b" officeooo:paragraph-rsid="00e78b0b"/>
    </style:style>
    <style:style style:name="P176" style:family="paragraph" style:parent-style-name="Standard" style:list-style-name="L42"/>
    <style:style style:name="P177" style:family="paragraph" style:parent-style-name="Standard" style:list-style-name="L42">
      <style:text-properties officeooo:rsid="00e8c242" officeooo:paragraph-rsid="00e8c242"/>
    </style:style>
    <style:style style:name="P178" style:family="paragraph" style:parent-style-name="Standard">
      <style:text-properties officeooo:rsid="00e8c242" officeooo:paragraph-rsid="00e8c242"/>
    </style:style>
    <style:style style:name="P179" style:family="paragraph" style:parent-style-name="Standard" style:list-style-name="L43"/>
    <style:style style:name="P180" style:family="paragraph" style:parent-style-name="Standard">
      <style:text-properties officeooo:rsid="007208f2" officeooo:paragraph-rsid="007208f2"/>
    </style:style>
    <style:style style:name="P181" style:family="paragraph" style:parent-style-name="Standard" style:list-style-name="L44">
      <style:text-properties officeooo:rsid="00a5fb84" officeooo:paragraph-rsid="00a5fb84"/>
    </style:style>
    <style:style style:name="P182" style:family="paragraph" style:parent-style-name="Standard" style:list-style-name="L44">
      <style:text-properties officeooo:rsid="007208f2" officeooo:paragraph-rsid="007208f2"/>
    </style:style>
    <style:style style:name="P183" style:family="paragraph" style:parent-style-name="Standard" style:list-style-name="L44">
      <style:text-properties officeooo:paragraph-rsid="007208f2"/>
    </style:style>
    <style:style style:name="P184" style:family="paragraph" style:parent-style-name="Standard">
      <style:text-properties officeooo:rsid="0073028a" officeooo:paragraph-rsid="0073028a"/>
    </style:style>
    <style:style style:name="P185" style:family="paragraph" style:parent-style-name="Standard" style:list-style-name="L45">
      <style:text-properties officeooo:paragraph-rsid="0073028a"/>
    </style:style>
    <style:style style:name="P186" style:family="paragraph" style:parent-style-name="Standard" style:list-style-name="L45">
      <style:text-properties officeooo:rsid="0073028a" officeooo:paragraph-rsid="0073028a"/>
    </style:style>
    <style:style style:name="P187" style:family="paragraph" style:parent-style-name="Standard">
      <style:text-properties officeooo:rsid="00fe217c" officeooo:paragraph-rsid="00fe217c"/>
    </style:style>
    <style:style style:name="P188" style:family="paragraph" style:parent-style-name="Standard" style:list-style-name="L46">
      <style:text-properties officeooo:paragraph-rsid="00fe217c"/>
    </style:style>
    <style:style style:name="P189" style:family="paragraph" style:parent-style-name="Standard" style:list-style-name="L46"/>
    <style:style style:name="P190" style:family="paragraph" style:parent-style-name="Standard" style:list-style-name="L46">
      <style:text-properties officeooo:paragraph-rsid="00a9736b"/>
    </style:style>
    <style:style style:name="P191" style:family="paragraph" style:parent-style-name="Standard" style:list-style-name="L46">
      <style:text-properties officeooo:rsid="00d75cc6" officeooo:paragraph-rsid="00eacfea"/>
    </style:style>
    <style:style style:name="P192" style:family="paragraph" style:parent-style-name="Standard" style:list-style-name="L46">
      <style:text-properties officeooo:rsid="00d75cc6" officeooo:paragraph-rsid="00d75cc6"/>
    </style:style>
    <style:style style:name="P193" style:family="paragraph" style:parent-style-name="Standard" style:list-style-name="L47"/>
    <style:style style:name="P194" style:family="paragraph" style:parent-style-name="Standard" style:list-style-name="L47">
      <style:text-properties officeooo:paragraph-rsid="00eb743b"/>
    </style:style>
    <style:style style:name="P195" style:family="paragraph" style:parent-style-name="Standard" style:list-style-name="L48"/>
    <style:style style:name="P196" style:family="paragraph" style:parent-style-name="Standard">
      <style:text-properties officeooo:paragraph-rsid="0125ac1f"/>
    </style:style>
    <style:style style:name="P197" style:family="paragraph" style:parent-style-name="Standard">
      <style:text-properties officeooo:rsid="00ffaec5" officeooo:paragraph-rsid="00ffaec5"/>
    </style:style>
    <style:style style:name="P198" style:family="paragraph" style:parent-style-name="Standard" style:list-style-name="L48">
      <style:text-properties officeooo:paragraph-rsid="00ffaec5"/>
    </style:style>
    <style:style style:name="P199" style:family="paragraph" style:parent-style-name="Standard">
      <style:text-properties officeooo:paragraph-rsid="0125cc31"/>
    </style:style>
    <style:style style:name="P200" style:family="paragraph" style:parent-style-name="Standard" style:list-style-name="L49">
      <style:text-properties officeooo:rsid="0125cc31" officeooo:paragraph-rsid="0125cc31"/>
    </style:style>
    <style:style style:name="P201" style:family="paragraph" style:parent-style-name="Standard">
      <style:text-properties officeooo:paragraph-rsid="00ffaec5"/>
    </style:style>
    <style:style style:name="P202" style:family="paragraph" style:parent-style-name="Standard" style:list-style-name="L50"/>
    <style:style style:name="P203" style:family="paragraph" style:parent-style-name="Standard">
      <style:text-properties fo:background-color="#ffffff"/>
    </style:style>
    <style:style style:name="P204" style:family="paragraph" style:parent-style-name="Standard">
      <style:text-properties fo:font-weight="bold" officeooo:rsid="007182b2" officeooo:paragraph-rsid="007304a2" style:font-weight-asian="bold" style:font-weight-complex="bold"/>
    </style:style>
    <style:style style:name="P205" style:family="paragraph" style:parent-style-name="Standard">
      <style:text-properties officeooo:rsid="007182b2" officeooo:paragraph-rsid="007304a2"/>
    </style:style>
    <style:style style:name="P206"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207" style:family="paragraph" style:parent-style-name="Standard">
      <style:text-properties officeooo:paragraph-rsid="0065d5e4"/>
    </style:style>
    <style:style style:name="P20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209" style:family="paragraph" style:parent-style-name="Standard">
      <style:text-properties fo:font-weight="bold" style:font-name-asian="Microsoft YaHei" style:font-weight-asian="bold" style:font-name-complex="Arial" style:font-weight-complex="bold"/>
    </style:style>
    <style:style style:name="P210" style:family="paragraph" style:parent-style-name="Standard">
      <style:text-properties fo:font-weight="normal" style:font-name-asian="Microsoft YaHei" style:font-weight-asian="normal" style:font-name-complex="Arial" style:font-weight-complex="normal"/>
    </style:style>
    <style:style style:name="P211" style:family="paragraph" style:parent-style-name="Standard">
      <style:text-properties officeooo:paragraph-rsid="007c33f4"/>
    </style:style>
    <style:style style:name="P212" style:family="paragraph" style:parent-style-name="Standard" style:list-style-name="L51"/>
    <style:style style:name="P213" style:family="paragraph" style:parent-style-name="Standard" style:list-style-name="L51">
      <style:text-properties officeooo:paragraph-rsid="00760491"/>
    </style:style>
    <style:style style:name="P214" style:family="paragraph" style:parent-style-name="Standard" style:list-style-name="L51">
      <style:text-properties officeooo:paragraph-rsid="00bbee4b"/>
    </style:style>
    <style:style style:name="P215" style:family="paragraph" style:parent-style-name="Standard" style:list-style-name="L52"/>
    <style:style style:name="P216"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217" style:family="paragraph" style:parent-style-name="Standard" style:list-style-name="L52">
      <style:text-properties officeooo:rsid="0111dfc9" officeooo:paragraph-rsid="0111dfc9"/>
    </style:style>
    <style:style style:name="P218" style:family="paragraph" style:parent-style-name="Standard" style:list-style-name="L52">
      <style:text-properties style:font-name="Verdana" fo:font-size="9.5pt" officeooo:rsid="0113fd84" officeooo:paragraph-rsid="0113fd84" style:font-name-asian="Verdana" style:font-size-asian="9.5pt" style:font-name-complex="Verdana" style:font-size-complex="9.5pt"/>
    </style:style>
    <style:style style:name="P219" style:family="paragraph" style:parent-style-name="Standard" style:list-style-name="L52">
      <style:text-properties officeooo:paragraph-rsid="0115f9ae"/>
    </style:style>
    <style:style style:name="P220" style:family="paragraph" style:parent-style-name="Standard">
      <style:text-properties officeooo:paragraph-rsid="0115f9ae"/>
    </style:style>
    <style:style style:name="P221" style:family="paragraph" style:parent-style-name="Standard">
      <style:text-properties officeooo:paragraph-rsid="0081c7f0"/>
    </style:style>
    <style:style style:name="P222" style:family="paragraph" style:parent-style-name="Heading_20_2">
      <style:text-properties officeooo:paragraph-rsid="00f2c16e"/>
    </style:style>
    <style:style style:name="P223" style:family="paragraph" style:parent-style-name="Standard">
      <style:text-properties officeooo:paragraph-rsid="00f2c16e"/>
    </style:style>
    <style:style style:name="P224" style:family="paragraph" style:parent-style-name="Standard">
      <style:text-properties officeooo:rsid="00f2c97e" officeooo:paragraph-rsid="00f2c97e"/>
    </style:style>
    <style:style style:name="P225" style:family="paragraph" style:parent-style-name="Standard">
      <style:text-properties officeooo:paragraph-rsid="010835fd"/>
    </style:style>
    <style:style style:name="P226" style:family="paragraph" style:parent-style-name="Standard">
      <style:text-properties officeooo:rsid="00eccd56" officeooo:paragraph-rsid="00ee5132"/>
    </style:style>
    <style:style style:name="P227" style:family="paragraph" style:parent-style-name="Standard">
      <style:text-properties officeooo:paragraph-rsid="00ee5132"/>
    </style:style>
    <style:style style:name="P228" style:family="paragraph" style:parent-style-name="Standard" style:list-style-name="L53"/>
    <style:style style:name="P229" style:family="paragraph" style:parent-style-name="Standard" style:list-style-name="L53">
      <style:text-properties officeooo:paragraph-rsid="01111829"/>
    </style:style>
    <style:style style:name="P230" style:family="paragraph" style:parent-style-name="Standard" style:list-style-name="L53">
      <style:text-properties officeooo:rsid="00ca203c" officeooo:paragraph-rsid="00ca203c"/>
    </style:style>
    <style:style style:name="P231" style:family="paragraph" style:parent-style-name="Standard" style:list-style-name="L53">
      <style:text-properties officeooo:rsid="01022ad9" officeooo:paragraph-rsid="01022ad9"/>
    </style:style>
    <style:style style:name="P232" style:family="paragraph" style:parent-style-name="Standard" style:list-style-name="L53">
      <style:text-properties officeooo:paragraph-rsid="010e8adb"/>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variant="small-caps" fo:color="#666666" loext:opacity="100%" fo:font-size="24pt" fo:font-weight="bold" style:font-size-asian="24pt" style:font-weight-asian="bold" style:font-size-complex="24pt" style:font-weight-complex="bold"/>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officeooo:rsid="00358a42"/>
    </style:style>
    <style:style style:name="T8" style:family="text">
      <style:text-properties officeooo:rsid="001a88b8"/>
    </style:style>
    <style:style style:name="T9" style:family="text">
      <style:text-properties fo:font-style="italic" officeooo:rsid="001a88b8" style:font-style-asian="italic" style:font-style-complex="italic"/>
    </style:style>
    <style:style style:name="T10" style:family="text">
      <style:text-properties officeooo:rsid="00cb10d0"/>
    </style:style>
    <style:style style:name="T11" style:family="text">
      <style:text-properties style:font-name="Verdana" fo:font-size="9.5pt" officeooo:rsid="00cb10d0" style:font-name-asian="Verdana" style:font-size-asian="9.5pt" style:font-name-complex="Verdana" style:font-size-complex="9.5pt"/>
    </style:style>
    <style:style style:name="T12" style:family="text">
      <style:text-properties fo:font-style="normal" fo:font-weight="normal" officeooo:rsid="00cb10d0" style:font-style-asian="normal" style:font-weight-asian="normal" style:font-style-complex="normal" style:font-weight-complex="normal"/>
    </style:style>
    <style:style style:name="T13"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4"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5"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6"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7"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8"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9" style:family="text">
      <style:text-properties fo:font-style="normal" fo:font-weight="normal" officeooo:rsid="001c7e89" style:font-style-asian="normal" style:font-weight-asian="normal" style:font-style-complex="normal" style:font-weight-complex="normal"/>
    </style:style>
    <style:style style:name="T20"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21"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22"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23"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24"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25"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6"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a88b8" style:font-style-asian="normal" style:font-weight-asian="normal" style:font-style-complex="normal" style:font-weight-complex="normal"/>
    </style:style>
    <style:style style:name="T29"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30"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31" style:family="text">
      <style:text-properties officeooo:rsid="0021428d"/>
    </style:style>
    <style:style style:name="T32" style:family="text">
      <style:text-properties officeooo:rsid="0022d415"/>
    </style:style>
    <style:style style:name="T33" style:family="text">
      <style:text-properties fo:font-weight="normal" style:font-weight-asian="normal" style:font-weight-complex="normal"/>
    </style:style>
    <style:style style:name="T34" style:family="text">
      <style:text-properties officeooo:rsid="00c328ee"/>
    </style:style>
    <style:style style:name="T35" style:family="text">
      <style:text-properties fo:font-weight="bold" officeooo:rsid="00c328ee" style:font-weight-asian="bold" style:font-weight-complex="bold"/>
    </style:style>
    <style:style style:name="T36" style:family="text">
      <style:text-properties style:font-name="Verdana" fo:font-size="9.5pt" officeooo:rsid="00c328ee" style:font-name-asian="Verdana" style:font-size-asian="9.5pt" style:font-name-complex="Verdana" style:font-size-complex="9.5pt"/>
    </style:style>
    <style:style style:name="T37" style:family="text">
      <style:text-properties officeooo:rsid="003fa1d4"/>
    </style:style>
    <style:style style:name="T38" style:family="text">
      <style:text-properties style:font-name="Verdana" fo:font-size="9.5pt" officeooo:rsid="003fa1d4" style:font-name-asian="Verdana" style:font-size-asian="9.5pt" style:font-name-complex="Verdana" style:font-size-complex="9.5pt"/>
    </style:style>
    <style:style style:name="T39" style:family="text">
      <style:text-properties style:font-name="Verdana" fo:font-size="9.5pt" officeooo:rsid="001dad61" style:font-name-asian="Verdana" style:font-size-asian="9.5pt" style:font-name-complex="Verdana" style:font-size-complex="9.5pt"/>
    </style:style>
    <style:style style:name="T40" style:family="text">
      <style:text-properties officeooo:rsid="0123c46e"/>
    </style:style>
    <style:style style:name="T41" style:family="text">
      <style:text-properties fo:background-color="#ffffff" loext:char-shading-value="0"/>
    </style:style>
    <style:style style:name="T42" style:family="text">
      <style:text-properties officeooo:rsid="0123c46e" fo:background-color="#ffffff" loext:char-shading-value="0"/>
    </style:style>
    <style:style style:name="T43"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44" style:family="text">
      <style:text-properties officeooo:rsid="001dad61"/>
    </style:style>
    <style:style style:name="T45" style:family="text">
      <style:text-properties fo:color="#0000cc" loext:opacity="100%" officeooo:rsid="001dad61"/>
    </style:style>
    <style:style style:name="T46" style:family="text">
      <style:text-properties officeooo:rsid="003b3167"/>
    </style:style>
    <style:style style:name="T47" style:family="text">
      <style:text-properties officeooo:rsid="003e40fc"/>
    </style:style>
    <style:style style:name="T48" style:family="text">
      <style:text-properties style:font-name="Verdana" fo:font-size="9.5pt" officeooo:rsid="003e40fc" style:font-name-asian="Verdana" style:font-size-asian="9.5pt" style:font-name-complex="Verdana" style:font-size-complex="9.5pt"/>
    </style:style>
    <style:style style:name="T49"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50" style:family="text">
      <style:text-properties fo:font-weight="bold" fo:background-color="#ffffff" loext:char-shading-value="0" style:font-weight-asian="bold" style:font-weight-complex="bold"/>
    </style:style>
    <style:style style:name="T51" style:family="text">
      <style:text-properties officeooo:rsid="0022c5db" fo:background-color="#ffffff" loext:char-shading-value="0"/>
    </style:style>
    <style:style style:name="T52" style:family="text">
      <style:text-properties fo:color="#0000cc" loext:opacity="100%" fo:background-color="#ffffff" loext:char-shading-value="0"/>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ize="9pt" fo:font-style="italic" style:font-size-asian="9pt" style:font-style-asian="italic" style:font-size-complex="9pt" style:font-style-complex="italic"/>
    </style:style>
    <style:style style:name="T55" style:family="text">
      <style:text-properties fo:font-style="italic" style:font-style-asian="italic" style:font-style-complex="italic"/>
    </style:style>
    <style:style style:name="T56" style:family="text">
      <style:text-properties fo:font-style="italic" officeooo:rsid="00f53324" style:font-style-asian="italic" style:font-style-complex="italic"/>
    </style:style>
    <style:style style:name="T57" style:family="text">
      <style:text-properties officeooo:rsid="006dbe70"/>
    </style:style>
    <style:style style:name="T58" style:family="text">
      <style:text-properties fo:color="#0000cc" loext:opacity="100%"/>
    </style:style>
    <style:style style:name="T59"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60" style:family="text">
      <style:text-properties officeooo:rsid="00cf607e"/>
    </style:style>
    <style:style style:name="T61" style:family="text">
      <style:text-properties fo:color="#0000cc" loext:opacity="100%" officeooo:rsid="00cf607e"/>
    </style:style>
    <style:style style:name="T62" style:family="text">
      <style:text-properties officeooo:rsid="0038a373"/>
    </style:style>
    <style:style style:name="T63" style:family="text">
      <style:text-properties style:font-name="Verdana" fo:font-size="9.5pt" officeooo:rsid="0038a373" style:font-name-asian="Verdana" style:font-size-asian="9.5pt" style:font-name-complex="Verdana" style:font-size-complex="9.5pt"/>
    </style:style>
    <style:style style:name="T64" style:family="text">
      <style:text-properties officeooo:rsid="0038b3d7"/>
    </style:style>
    <style:style style:name="T65" style:family="text">
      <style:text-properties officeooo:rsid="003a0175"/>
    </style:style>
    <style:style style:name="T66" style:family="text">
      <style:text-properties officeooo:rsid="0039b95b"/>
    </style:style>
    <style:style style:name="T67" style:family="text">
      <style:text-properties style:font-name="Verdana" fo:font-size="9.5pt" officeooo:rsid="003a0175" style:font-name-asian="Verdana" style:font-size-asian="9.5pt" style:font-name-complex="Verdana" style:font-size-complex="9.5pt"/>
    </style:style>
    <style:style style:name="T68" style:family="text">
      <style:text-properties style:font-name="Verdana" fo:font-size="9.5pt" officeooo:rsid="004a9743" style:font-name-asian="Verdana" style:font-size-asian="9.5pt" style:font-name-complex="Verdana" style:font-size-complex="9.5pt"/>
    </style:style>
    <style:style style:name="T69"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70" style:family="text">
      <style:text-properties fo:font-weight="bold" officeooo:rsid="004a9743" style:font-weight-asian="bold" style:font-weight-complex="bold"/>
    </style:style>
    <style:style style:name="T71" style:family="text">
      <style:text-properties officeooo:rsid="004a9743"/>
    </style:style>
    <style:style style:name="T72" style:family="text">
      <style:text-properties style:font-name="Verdana" fo:font-size="9.5pt" officeooo:rsid="003b3167" style:font-name-asian="Verdana" style:font-size-asian="9.5pt" style:font-name-complex="Verdana" style:font-size-complex="9.5pt"/>
    </style:style>
    <style:style style:name="T73" style:family="text">
      <style:text-properties officeooo:rsid="004867d0"/>
    </style:style>
    <style:style style:name="T74" style:family="text">
      <style:text-properties style:font-name="Verdana" fo:font-size="9.5pt" officeooo:rsid="002e1bd4" style:font-name-asian="Verdana" style:font-size-asian="9.5pt" style:font-name-complex="Verdana" style:font-size-complex="9.5pt"/>
    </style:style>
    <style:style style:name="T75" style:family="text">
      <style:text-properties style:font-name="Verdana" fo:font-size="9.5pt" officeooo:rsid="003004f0" style:font-name-asian="Verdana" style:font-size-asian="9.5pt" style:font-name-complex="Verdana" style:font-size-complex="9.5pt"/>
    </style:style>
    <style:style style:name="T76" style:family="text">
      <style:text-properties style:font-name="Verdana" fo:font-size="9.5pt" fo:font-weight="bold" officeooo:rsid="011e5e14" style:font-name-asian="Verdana" style:font-size-asian="9.5pt" style:font-weight-asian="bold" style:font-name-complex="Verdana" style:font-size-complex="9.5pt" style:font-weight-complex="bold"/>
    </style:style>
    <style:style style:name="T77" style:family="text">
      <style:text-properties style:font-name="Verdana" fo:font-size="9.5pt" officeooo:rsid="004b0ff7" style:font-name-asian="Verdana" style:font-size-asian="9.5pt" style:font-name-complex="Verdana" style:font-size-complex="9.5pt"/>
    </style:style>
    <style:style style:name="T78"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79"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80" style:family="text">
      <style:text-properties style:font-name="Verdana" fo:font-size="9.5pt" officeooo:rsid="004b0e5d" style:font-name-asian="Verdana" style:font-size-asian="9.5pt" style:font-name-complex="Verdana" style:font-size-complex="9.5pt"/>
    </style:style>
    <style:style style:name="T81"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82"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83"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84" style:family="text">
      <style:text-properties style:font-name="Verdana" fo:font-size="9.5pt" officeooo:rsid="005759b8" style:font-name-asian="Verdana" style:font-size-asian="9.5pt" style:font-name-complex="Verdana" style:font-size-complex="9.5pt"/>
    </style:style>
    <style:style style:name="T85" style:family="text">
      <style:text-properties style:font-name="Verdana" fo:font-size="9.5pt" officeooo:rsid="005565b8" style:font-name-asian="Verdana" style:font-size-asian="9.5pt" style:font-name-complex="Verdana" style:font-size-complex="9.5pt"/>
    </style:style>
    <style:style style:name="T86" style:family="text">
      <style:text-properties style:font-name="Verdana" fo:font-size="9.5pt" fo:font-weight="bold" officeooo:rsid="005759b8" style:font-name-asian="Verdana" style:font-size-asian="9.5pt" style:font-name-complex="Verdana" style:font-size-complex="9.5pt"/>
    </style:style>
    <style:style style:name="T87"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88"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89" style:family="text">
      <style:text-properties style:font-name="Verdana" fo:font-size="9.5pt" fo:font-weight="normal" officeooo:rsid="01211422" style:font-name-asian="Verdana" style:font-size-asian="9.5pt" style:font-weight-asian="normal" style:font-name-complex="Verdana" style:font-size-complex="9.5pt" style:font-weight-complex="normal"/>
    </style:style>
    <style:style style:name="T90" style:family="text">
      <style:text-properties fo:font-size="9.5pt" officeooo:rsid="005759b8" style:font-size-asian="9.5pt" style:font-size-complex="9.5pt"/>
    </style:style>
    <style:style style:name="T91" style:family="text">
      <style:text-properties fo:font-size="9.5pt" fo:font-weight="normal" style:font-size-asian="9.5pt" style:font-weight-asian="normal" style:font-size-complex="9.5pt" style:font-weight-complex="normal"/>
    </style:style>
    <style:style style:name="T92" style:family="text">
      <style:text-properties fo:font-size="9.5pt" style:font-size-asian="9.5pt" style:font-size-complex="9.5pt"/>
    </style:style>
    <style:style style:name="T93" style:family="text">
      <style:text-properties style:font-name="Verdana" fo:font-size="9.5pt" officeooo:rsid="004fa62e" style:font-name-asian="Verdana" style:font-size-asian="9.5pt" style:font-name-complex="Verdana" style:font-size-complex="9.5pt"/>
    </style:style>
    <style:style style:name="T94" style:family="text">
      <style:text-properties officeooo:rsid="004fa62e"/>
    </style:style>
    <style:style style:name="T95" style:family="text">
      <style:text-properties officeooo:rsid="0111fd5f" fo:background-color="#ffffff" loext:char-shading-value="0"/>
    </style:style>
    <style:style style:name="T96" style:family="text">
      <style:text-properties fo:font-weight="normal" officeooo:rsid="0051203a" fo:background-color="#ffffff" loext:char-shading-value="0" style:font-weight-asian="normal" style:font-weight-complex="normal"/>
    </style:style>
    <style:style style:name="T97" style:family="text">
      <style:text-properties fo:font-size="9.5pt" fo:font-weight="normal" officeooo:rsid="0051203a" fo:background-color="#ffffff" loext:char-shading-value="0" style:font-size-asian="9.5pt" style:font-weight-asian="normal" style:font-size-complex="9.5pt" style:font-weight-complex="normal"/>
    </style:style>
    <style:style style:name="T98" style:family="text">
      <style:text-properties fo:font-size="9.5pt" fo:font-weight="normal" officeooo:rsid="0111fd5f" fo:background-color="#ffffff" loext:char-shading-value="0" style:font-size-asian="9.5pt" style:font-weight-asian="normal" style:font-size-complex="9.5pt" style:font-weight-complex="normal"/>
    </style:style>
    <style:style style:name="T99" style:family="text">
      <style:text-properties fo:font-size="9.5pt" fo:font-weight="bold" officeooo:rsid="0111fd5f" fo:background-color="#ffffff" loext:char-shading-value="0" style:font-size-asian="9.5pt" style:font-weight-asian="bold" style:font-size-complex="9.5pt" style:font-weight-complex="bold"/>
    </style:style>
    <style:style style:name="T100" style:family="text">
      <style:text-properties fo:font-size="9.5pt" fo:font-weight="normal" officeooo:rsid="0052d53c" fo:background-color="#ffffff" loext:char-shading-value="0" style:font-size-asian="9.5pt" style:font-weight-asian="normal" style:font-size-complex="9.5pt" style:font-weight-complex="normal"/>
    </style:style>
    <style:style style:name="T101" style:family="text">
      <style:text-properties fo:font-size="9.5pt" fo:font-weight="normal" officeooo:rsid="0113cc2d" fo:background-color="#ffffff" loext:char-shading-value="0" style:font-size-asian="9.5pt" style:font-weight-asian="normal" style:font-size-complex="9.5pt" style:font-weight-complex="normal"/>
    </style:style>
    <style:style style:name="T102" style:family="text">
      <style:text-properties fo:font-size="9.5pt" fo:background-color="#ffffff" loext:char-shading-value="0" style:font-size-asian="9.5pt" style:font-size-complex="9.5pt"/>
    </style:style>
    <style:style style:name="T103" style:family="text">
      <style:text-properties style:font-name="Verdana" fo:font-size="9.5pt" officeooo:rsid="00547e01" style:font-name-asian="Verdana" style:font-size-asian="9.5pt" style:font-name-complex="Verdana" style:font-size-complex="9.5pt"/>
    </style:style>
    <style:style style:name="T104"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05" style:family="text">
      <style:text-properties fo:color="#b47804" loext:opacity="100%" style:font-name="Verdana" fo:font-size="14pt" style:text-underline-style="solid" style:text-underline-width="auto" style:text-underline-color="font-color" fo:font-weight="bold" officeooo:rsid="005c70ac"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T106" style:family="text">
      <style:text-properties fo:color="#b47804" loext:opacity="100%" style:font-name="Verdana" fo:font-size="14pt" style:text-underline-style="solid" style:text-underline-width="auto" style:text-underline-color="font-color" fo:font-weight="bold" officeooo:rsid="006481b9"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T107" style:family="text">
      <style:text-properties style:font-name="Verdana" fo:font-size="9.5pt" officeooo:rsid="005c70ac" style:font-name-asian="Verdana" style:font-size-asian="9.5pt" style:font-name-complex="Verdana" style:font-size-complex="9.5pt"/>
    </style:style>
    <style:style style:name="T108" style:family="text">
      <style:text-properties style:font-name="Verdana" fo:font-size="9.5pt" officeooo:rsid="006dbe70" style:font-name-asian="Verdana" style:font-size-asian="9.5pt" style:font-name-complex="Verdana" style:font-size-complex="9.5pt"/>
    </style:style>
    <style:style style:name="T109" style:family="text">
      <style:text-properties fo:font-weight="bold" officeooo:rsid="0021428d" style:font-weight-asian="bold" style:font-weight-complex="bold"/>
    </style:style>
    <style:style style:name="T110"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11"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12" style:family="text">
      <style:text-properties officeooo:rsid="006fb465"/>
    </style:style>
    <style:style style:name="T113"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14"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15" style:family="text">
      <style:text-properties style:font-name="Verdana" fo:font-size="9.5pt" officeooo:rsid="005cb1ac" style:font-name-asian="Verdana" style:font-size-asian="9.5pt" style:font-name-complex="Verdana" style:font-size-complex="9.5pt"/>
    </style:style>
    <style:style style:name="T116" style:family="text">
      <style:text-properties style:font-name="Verdana" fo:font-size="9.5pt" officeooo:rsid="006fb465" style:font-name-asian="Verdana" style:font-size-asian="9.5pt" style:font-name-complex="Verdana" style:font-size-complex="9.5pt"/>
    </style:style>
    <style:style style:name="T117"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18" style:family="text">
      <style:text-properties officeooo:rsid="00708e6d"/>
    </style:style>
    <style:style style:name="T119" style:family="text">
      <style:text-properties style:font-name="Verdana"/>
    </style:style>
    <style:style style:name="T120" style:family="text">
      <style:text-properties fo:color="#0000cc" loext:opacity="100%" style:font-name="Verdana"/>
    </style:style>
    <style:style style:name="T121" style:family="text">
      <style:text-properties style:use-window-font-color="true" loext:opacity="0%" style:font-name="Verdana" fo:font-weight="bold" style:font-weight-asian="bold" style:font-weight-complex="bold"/>
    </style:style>
    <style:style style:name="T122" style:family="text">
      <style:text-properties officeooo:rsid="002e1bd4"/>
    </style:style>
    <style:style style:name="T123" style:family="text">
      <style:text-properties officeooo:rsid="0032d5b4" fo:background-color="#ffffff" loext:char-shading-value="0"/>
    </style:style>
    <style:style style:name="T124" style:family="text">
      <style:text-properties officeooo:rsid="0046eb07" fo:background-color="#ffffff" loext:char-shading-value="0"/>
    </style:style>
    <style:style style:name="T125" style:family="text">
      <style:text-properties style:font-name="Verdana" fo:font-size="9.5pt" officeooo:rsid="002d6179" style:font-name-asian="Verdana" style:font-size-asian="9.5pt" style:font-name-complex="Verdana" style:font-size-complex="9.5pt"/>
    </style:style>
    <style:style style:name="T126" style:family="text">
      <style:text-properties style:font-name="Verdana" fo:font-size="9.5pt" officeooo:rsid="00ae37b1" style:font-name-asian="Verdana" style:font-size-asian="9.5pt" style:font-name-complex="Verdana" style:font-size-complex="9.5pt"/>
    </style:style>
    <style:style style:name="T127" style:family="text">
      <style:text-properties style:font-name="Verdana" fo:font-size="9.5pt" officeooo:rsid="00ae76c3" style:font-name-asian="Verdana" style:font-size-asian="9.5pt" style:font-name-complex="Verdana" style:font-size-complex="9.5pt"/>
    </style:style>
    <style:style style:name="T128" style:family="text">
      <style:text-properties officeooo:rsid="00ae76c3"/>
    </style:style>
    <style:style style:name="T129" style:family="text">
      <style:text-properties fo:font-weight="bold" officeooo:rsid="00ae76c3" style:font-weight-asian="bold" style:font-weight-complex="bold"/>
    </style:style>
    <style:style style:name="T130" style:family="text">
      <style:text-properties officeooo:rsid="00b044e2"/>
    </style:style>
    <style:style style:name="T131" style:family="text">
      <style:text-properties fo:font-weight="bold" officeooo:rsid="00f74ecc" style:font-weight-asian="bold" style:font-weight-complex="bold"/>
    </style:style>
    <style:style style:name="T132" style:family="text">
      <style:text-properties officeooo:rsid="00f74ecc"/>
    </style:style>
    <style:style style:name="T133" style:family="text">
      <style:text-properties officeooo:rsid="00f725d4"/>
    </style:style>
    <style:style style:name="T134" style:family="text">
      <style:text-properties officeooo:rsid="00e495ab"/>
    </style:style>
    <style:style style:name="T135" style:family="text">
      <style:text-properties fo:font-weight="bold" officeooo:rsid="000e9932" style:font-weight-asian="bold" style:font-weight-complex="bold"/>
    </style:style>
    <style:style style:name="T136" style:family="text">
      <style:text-properties officeooo:rsid="000e9932"/>
    </style:style>
    <style:style style:name="T137" style:family="text">
      <style:text-properties officeooo:rsid="00943608"/>
    </style:style>
    <style:style style:name="T138" style:family="text">
      <style:text-properties style:font-name="Verdana" fo:font-size="9.5pt" officeooo:rsid="000e9932" style:font-name-asian="Verdana" style:font-size-asian="9.5pt" style:font-name-complex="Verdana" style:font-size-complex="9.5pt"/>
    </style:style>
    <style:style style:name="T139" style:family="text">
      <style:text-properties style:font-name="Verdana" fo:font-size="9.5pt" officeooo:rsid="00943608" style:font-name-asian="Verdana" style:font-size-asian="9.5pt" style:font-name-complex="Verdana" style:font-size-complex="9.5pt"/>
    </style:style>
    <style:style style:name="T140" style:family="text">
      <style:text-properties fo:font-size="7pt" fo:font-style="italic" officeooo:rsid="00943608" style:font-size-asian="7pt" style:font-style-asian="italic" style:font-size-complex="7pt" style:font-style-complex="italic"/>
    </style:style>
    <style:style style:name="T141"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42"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143" style:family="text">
      <style:text-properties fo:font-weight="bold" officeooo:rsid="009e5532" style:font-weight-asian="bold" style:font-weight-complex="bold"/>
    </style:style>
    <style:style style:name="T144" style:family="text">
      <style:text-properties fo:font-weight="normal" officeooo:rsid="009e5532" style:font-weight-asian="normal" style:font-weight-complex="normal"/>
    </style:style>
    <style:style style:name="T145"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46"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47" style:family="text">
      <style:text-properties style:font-name="Verdana" fo:font-size="9.5pt" officeooo:rsid="0017356d" style:font-name-asian="Verdana" style:font-size-asian="9.5pt" style:font-name-complex="Verdana" style:font-size-complex="9.5pt"/>
    </style:style>
    <style:style style:name="T148"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49"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0" style:family="text">
      <style:text-properties style:font-name="Verdana" fo:font-size="9.5pt" officeooo:rsid="009f1ce4" style:font-name-asian="Verdana" style:font-size-asian="9.5pt" style:font-name-complex="Verdana" style:font-size-complex="9.5pt"/>
    </style:style>
    <style:style style:name="T151" style:family="text">
      <style:text-properties officeooo:rsid="00a0113f"/>
    </style:style>
    <style:style style:name="T152" style:family="text">
      <style:text-properties officeooo:rsid="00e6165e"/>
    </style:style>
    <style:style style:name="T153"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54" style:family="text">
      <style:text-properties style:font-name="Verdana" fo:font-size="9.5pt" officeooo:rsid="00a1df60" style:font-name-asian="Verdana" style:font-size-asian="9.5pt" style:font-name-complex="Verdana" style:font-size-complex="9.5pt"/>
    </style:style>
    <style:style style:name="T155"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56" style:family="text">
      <style:text-properties style:font-name="Verdana" fo:font-size="9.5pt" officeooo:rsid="00a294e6" style:font-name-asian="Verdana" style:font-size-asian="9.5pt" style:font-name-complex="Verdana" style:font-size-complex="9.5pt"/>
    </style:style>
    <style:style style:name="T157" style:family="text">
      <style:text-properties style:font-name="Verdana" fo:font-size="9.5pt" officeooo:rsid="00a38e6f" style:font-name-asian="Verdana" style:font-size-asian="9.5pt" style:font-name-complex="Verdana" style:font-size-complex="9.5pt"/>
    </style:style>
    <style:style style:name="T158" style:family="text">
      <style:text-properties fo:font-size="7pt" fo:font-style="italic" style:font-size-asian="7pt" style:font-style-asian="italic" style:font-size-complex="7pt" style:font-style-complex="italic"/>
    </style:style>
    <style:style style:name="T159" style:family="text">
      <style:text-properties fo:font-weight="bold" officeooo:rsid="00700a53" style:font-weight-asian="bold" style:font-weight-complex="bold"/>
    </style:style>
    <style:style style:name="T160" style:family="text">
      <style:text-properties fo:font-weight="normal" officeooo:rsid="00f9c9fc" style:font-weight-asian="normal" style:font-weight-complex="normal"/>
    </style:style>
    <style:style style:name="T161" style:family="text">
      <style:text-properties fo:font-weight="normal" officeooo:rsid="00fdb9f4" style:font-weight-asian="normal" style:font-weight-complex="normal"/>
    </style:style>
    <style:style style:name="T162" style:family="text">
      <style:text-properties fo:font-weight="bold" officeooo:rsid="007208f2" style:font-weight-asian="bold" style:font-weight-complex="bold"/>
    </style:style>
    <style:style style:name="T163"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64" style:family="text">
      <style:text-properties fo:font-weight="normal" officeooo:rsid="007208f2" style:font-weight-asian="normal" style:font-weight-complex="normal"/>
    </style:style>
    <style:style style:name="T165"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66" style:family="text">
      <style:text-properties fo:font-weight="bold" officeooo:rsid="0073028a" style:font-weight-asian="bold" style:font-weight-complex="bold"/>
    </style:style>
    <style:style style:name="T167" style:family="text">
      <style:text-properties officeooo:rsid="0073028a"/>
    </style:style>
    <style:style style:name="T168" style:family="text">
      <style:text-properties style:font-name="Verdana" fo:font-size="9.5pt" officeooo:rsid="0073028a" style:font-name-asian="Verdana" style:font-size-asian="9.5pt" style:font-name-complex="Verdana" style:font-size-complex="9.5pt"/>
    </style:style>
    <style:style style:name="T169"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70" style:family="text">
      <style:text-properties fo:font-weight="bold" officeooo:rsid="00fe217c" style:font-weight-asian="bold" style:font-weight-complex="bold"/>
    </style:style>
    <style:style style:name="T171" style:family="text">
      <style:text-properties officeooo:rsid="00fe217c"/>
    </style:style>
    <style:style style:name="T172"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73" style:family="text">
      <style:text-properties fo:font-weight="normal" officeooo:rsid="00a79a79" style:font-weight-asian="normal" style:font-weight-complex="normal"/>
    </style:style>
    <style:style style:name="T174"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75"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76"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77" style:family="text">
      <style:text-properties fo:font-weight="bold" officeooo:rsid="00eacfea" style:font-weight-asian="bold" style:font-weight-complex="bold"/>
    </style:style>
    <style:style style:name="T178" style:family="text">
      <style:text-properties officeooo:rsid="00eacfea"/>
    </style:style>
    <style:style style:name="T179" style:family="text">
      <style:text-properties fo:font-weight="bold" officeooo:rsid="00eb743b" style:font-weight-asian="bold" style:font-weight-complex="bold"/>
    </style:style>
    <style:style style:name="T180" style:family="text">
      <style:text-properties officeooo:rsid="00eb743b"/>
    </style:style>
    <style:style style:name="T181" style:family="text">
      <style:text-properties fo:font-weight="bold" officeooo:rsid="00ffaec5" style:font-weight-asian="bold" style:font-weight-complex="bold"/>
    </style:style>
    <style:style style:name="T182" style:family="text">
      <style:text-properties fo:font-weight="normal" officeooo:rsid="00ffaec5" style:font-weight-asian="normal" style:font-weight-complex="normal"/>
    </style:style>
    <style:style style:name="T183" style:family="text">
      <style:text-properties officeooo:rsid="00ffaec5"/>
    </style:style>
    <style:style style:name="T184" style:family="text">
      <style:text-properties officeooo:rsid="0125cc31"/>
    </style:style>
    <style:style style:name="T18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6" style:family="text">
      <style:text-properties style:font-name="Verdana" fo:font-size="9.5pt" style:font-name-asian="Verdana" style:font-size-asian="9.5pt" style:font-name-complex="Verdana" style:font-size-complex="9.5pt"/>
    </style:style>
    <style:style style:name="T187" style:family="text">
      <style:text-properties officeooo:rsid="0072422b"/>
    </style:style>
    <style:style style:name="T188" style:family="text">
      <style:text-properties officeooo:rsid="00735f0e"/>
    </style:style>
    <style:style style:name="T189" style:family="text">
      <style:text-properties officeooo:rsid="0065d5e4"/>
    </style:style>
    <style:style style:name="T190" style:family="text">
      <style:text-properties style:font-name="Verdana" fo:font-size="9.5pt" officeooo:rsid="0065d5e4" style:font-name-asian="Verdana" style:font-size-asian="9.5pt" style:font-name-complex="Verdana" style:font-size-complex="9.5pt"/>
    </style:style>
    <style:style style:name="T191" style:family="text">
      <style:text-properties officeooo:rsid="0066d57c"/>
    </style:style>
    <style:style style:name="T192" style:family="text">
      <style:text-properties officeooo:rsid="0067d10e"/>
    </style:style>
    <style:style style:name="T193"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94" style:family="text">
      <style:text-properties fo:font-size="16pt" style:font-name-asian="Microsoft YaHei" style:font-size-asian="16pt" style:font-name-complex="Arial" style:font-size-complex="16pt"/>
    </style:style>
    <style:style style:name="T195" style:family="text">
      <style:text-properties fo:font-weight="normal" style:font-name-asian="Microsoft YaHei" style:font-weight-asian="normal" style:font-name-complex="Arial" style:font-weight-complex="normal"/>
    </style:style>
    <style:style style:name="T196" style:family="text">
      <style:text-properties officeooo:rsid="007c33f4"/>
    </style:style>
    <style:style style:name="T197" style:family="text">
      <style:text-properties style:font-name="Verdana" fo:font-size="9.5pt" officeooo:rsid="007c33f4" style:font-name-asian="Verdana" style:font-size-asian="9.5pt" style:font-name-complex="Verdana" style:font-size-complex="9.5pt"/>
    </style:style>
    <style:style style:name="T198" style:family="text">
      <style:text-properties fo:font-weight="bold" officeooo:rsid="00760491" style:font-weight-asian="bold" style:font-weight-complex="bold"/>
    </style:style>
    <style:style style:name="T199" style:family="text">
      <style:text-properties style:font-name="Verdana" fo:font-size="9.5pt" officeooo:rsid="00760491" style:font-name-asian="Verdana" style:font-size-asian="9.5pt" style:font-name-complex="Verdana" style:font-size-complex="9.5pt"/>
    </style:style>
    <style:style style:name="T200" style:family="text">
      <style:text-properties officeooo:rsid="00760491"/>
    </style:style>
    <style:style style:name="T201" style:family="text">
      <style:text-properties style:font-name="Verdana" fo:font-size="9.5pt" officeooo:rsid="00b9face" style:font-name-asian="Verdana" style:font-size-asian="9.5pt" style:font-name-complex="Verdana" style:font-size-complex="9.5pt"/>
    </style:style>
    <style:style style:name="T202" style:family="text">
      <style:text-properties officeooo:rsid="00b927d5"/>
    </style:style>
    <style:style style:name="T203" style:family="text">
      <style:text-properties style:font-name="Verdana" fo:font-size="9.5pt" officeooo:rsid="00b3882f" style:font-name-asian="Verdana" style:font-size-asian="9.5pt" style:font-name-complex="Verdana" style:font-size-complex="9.5pt"/>
    </style:style>
    <style:style style:name="T204" style:family="text">
      <style:text-properties officeooo:rsid="00781faa"/>
    </style:style>
    <style:style style:name="T205" style:family="text">
      <style:text-properties style:font-name="Verdana" fo:font-size="9.5pt" officeooo:rsid="007a1871" style:font-name-asian="Verdana" style:font-size-asian="9.5pt" style:font-name-complex="Verdana" style:font-size-complex="9.5pt"/>
    </style:style>
    <style:style style:name="T206" style:family="text">
      <style:text-properties officeooo:rsid="00bd2f7e"/>
    </style:style>
    <style:style style:name="T207" style:family="text">
      <style:text-properties style:font-name="Verdana" fo:font-size="9.5pt" officeooo:rsid="00be9c82" style:font-name-asian="Verdana" style:font-size-asian="9.5pt" style:font-name-complex="Verdana" style:font-size-complex="9.5pt"/>
    </style:style>
    <style:style style:name="T208" style:family="text">
      <style:text-properties officeooo:rsid="00b3b0a4"/>
    </style:style>
    <style:style style:name="T209" style:family="text">
      <style:text-properties officeooo:rsid="00bbee4b"/>
    </style:style>
    <style:style style:name="T210" style:family="text">
      <style:text-properties officeooo:rsid="00bfb429"/>
    </style:style>
    <style:style style:name="T211" style:family="text">
      <style:text-properties style:font-name="Verdana" fo:font-size="9.5pt" officeooo:rsid="00c141f6" style:font-name-asian="Verdana" style:font-size-asian="9.5pt" style:font-name-complex="Verdana" style:font-size-complex="9.5pt"/>
    </style:style>
    <style:style style:name="T212" style:family="text">
      <style:text-properties officeooo:rsid="00b59325"/>
    </style:style>
    <style:style style:name="T213" style:family="text">
      <style:text-properties style:font-name="Verdana" fo:font-size="9.5pt" officeooo:rsid="00b59325" style:font-name-asian="Verdana" style:font-size-asian="9.5pt" style:font-name-complex="Verdana" style:font-size-complex="9.5pt"/>
    </style:style>
    <style:style style:name="T214" style:family="text">
      <style:text-properties style:font-name="Verdana" fo:font-size="9.5pt" officeooo:rsid="00b6e837" style:font-name-asian="Verdana" style:font-size-asian="9.5pt" style:font-name-complex="Verdana" style:font-size-complex="9.5pt"/>
    </style:style>
    <style:style style:name="T215" style:family="text">
      <style:text-properties officeooo:rsid="00776c89"/>
    </style:style>
    <style:style style:name="T216" style:family="text">
      <style:text-properties officeooo:rsid="01153861"/>
    </style:style>
    <style:style style:name="T217" style:family="text">
      <style:text-properties officeooo:rsid="0117948d"/>
    </style:style>
    <style:style style:name="T218" style:family="text">
      <style:text-properties style:font-name="Verdana" fo:font-size="9.5pt" officeooo:rsid="011b1c25" style:font-name-asian="Verdana" style:font-size-asian="9.5pt" style:font-name-complex="Verdana" style:font-size-complex="9.5pt"/>
    </style:style>
    <style:style style:name="T219" style:family="text">
      <style:text-properties style:font-name="Verdana" fo:font-size="9.5pt" officeooo:rsid="0113f050" style:font-name-asian="Verdana" style:font-size-asian="9.5pt" style:font-name-complex="Verdana" style:font-size-complex="9.5pt"/>
    </style:style>
    <style:style style:name="T220" style:family="text">
      <style:text-properties style:font-name="Verdana" fo:font-size="9.5pt" officeooo:rsid="0113fd84" style:font-name-asian="Verdana" style:font-size-asian="9.5pt" style:font-name-complex="Verdana" style:font-size-complex="9.5pt"/>
    </style:style>
    <style:style style:name="T221" style:family="text">
      <style:text-properties officeooo:rsid="0115013e"/>
    </style:style>
    <style:style style:name="T222" style:family="text">
      <style:text-properties officeooo:rsid="0082d168"/>
    </style:style>
    <style:style style:name="T223" style:family="text">
      <style:text-properties officeooo:rsid="0086a1f9"/>
    </style:style>
    <style:style style:name="T224" style:family="text">
      <style:text-properties officeooo:rsid="0081c7f0"/>
    </style:style>
    <style:style style:name="T225" style:family="text">
      <style:text-properties officeooo:rsid="0086cda8"/>
    </style:style>
    <style:style style:name="T226" style:family="text">
      <style:text-properties officeooo:rsid="00833fe2"/>
    </style:style>
    <style:style style:name="T227" style:family="text">
      <style:text-properties fo:font-size="16pt" officeooo:rsid="00f2c16e" style:font-name-asian="Microsoft YaHei" style:font-size-asian="16pt" style:font-name-complex="Arial" style:font-size-complex="16pt"/>
    </style:style>
    <style:style style:name="T228" style:family="text">
      <style:text-properties officeooo:rsid="011a023c"/>
    </style:style>
    <style:style style:name="T229" style:family="text">
      <style:text-properties officeooo:rsid="0129c3bd"/>
    </style:style>
    <style:style style:name="T230"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231" style:family="text">
      <style:text-properties officeooo:rsid="000cfd31"/>
    </style:style>
    <style:style style:name="T232" style:family="text">
      <style:text-properties officeooo:rsid="010835fd"/>
    </style:style>
    <style:style style:name="T233" style:family="text">
      <style:text-properties officeooo:rsid="00ee5132"/>
    </style:style>
    <style:style style:name="T234" style:family="text">
      <style:text-properties fo:font-weight="bold" officeooo:rsid="00d4c531" style:font-weight-asian="bold" style:font-weight-complex="bold"/>
    </style:style>
    <style:style style:name="T235" style:family="text">
      <style:text-properties officeooo:rsid="00ca203c"/>
    </style:style>
    <style:style style:name="T236"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237" style:family="text">
      <style:text-properties officeooo:rsid="01111829"/>
    </style:style>
    <style:style style:name="T238" style:family="text">
      <style:text-properties fo:font-weight="bold" officeooo:rsid="01111829" style:font-weight-asian="bold" style:font-weight-complex="bold"/>
    </style:style>
    <style:style style:name="T239" style:family="text">
      <style:text-properties fo:font-weight="normal" officeooo:rsid="01111829" style:font-weight-asian="normal" style:font-weight-complex="normal"/>
    </style:style>
    <style:style style:name="T240" style:family="text">
      <style:text-properties officeooo:rsid="00f00067"/>
    </style:style>
    <style:style style:name="T241" style:family="text">
      <style:text-properties fo:font-weight="bold" officeooo:rsid="010c4fe1" style:font-weight-asian="bold" style:font-weight-complex="bold"/>
    </style:style>
    <style:style style:name="T242" style:family="text">
      <style:text-properties officeooo:rsid="01035a74"/>
    </style:style>
    <style:style style:name="T243" style:family="text">
      <style:text-properties fo:font-weight="bold" officeooo:rsid="012b8224" style:font-weight-asian="bold" style:font-weight-complex="bold"/>
    </style:style>
    <style:style style:name="T244" style:family="text">
      <style:text-properties officeooo:rsid="012b8224"/>
    </style:style>
    <style:style style:name="T245" style:family="text">
      <style:text-properties officeooo:rsid="010f5ee4"/>
    </style:style>
    <style:style style:name="T246" style:family="text">
      <style:text-properties officeooo:rsid="010e8adb"/>
    </style:style>
    <style:style style:name="T247" style:family="text">
      <style:text-properties officeooo:rsid="012d0947"/>
    </style:style>
    <style:style style:name="T248" style:family="text">
      <style:text-properties officeooo:rsid="00d4d671"/>
    </style:style>
    <style:style style:name="T249" style:family="text">
      <style:text-properties officeooo:rsid="010657b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3" text:anchor-type="page" text:anchor-page-number="23" svg:x="3.138cm" svg:y="9.222cm" svg:width="13.162cm" svg:height="5.052cm" draw:z-index="4">
        <draw:image xlink:href="Pictures/10000000000005B300000230EA6B3CD4.png" xlink:type="simple" xlink:show="embed" xlink:actuate="onLoad" draw:mime-type="image/png"/>
      </draw:frame>
      <text:p text:style-name="P1"><draw:frame draw:style-name="fr1" draw:name="Bild2" text:anchor-type="paragraph" svg:x="0.055cm" svg:y="0.046cm" svg:width="16.619cm" style:rel-width="scale" svg:height="8.019cm" style:rel-height="scale" draw:z-index="2"><draw:image xlink:href="Pictures/10000000000003C0000001C0DB8B4337.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4">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text:style-name="L1">
        <text:list-item>
          <text:p text:style-name="P6">Installation instructions</text:p>
        </text:list-item>
        <text:list-item>
          <text:p text:style-name="P6">Help on common issues</text:p>
        </text:list-item>
        <text:list-item>
          <text:p text:style-name="P6">Details on the game options</text:p>
        </text:list-item>
        <text:list-item>
          <text:p text:style-name="P6">...and more, see the table of contents below!</text:p>
        </text:list-item>
      </text:list>
      <text:p text:style-name="P4"/>
      <text:p text:style-name="Standard"><text:span text:style-name="Default_20_Paragraph_20_Font"><text:span text:style-name="T5">In case you don't want to read it all, </text:span></text:span><text:span text:style-name="Default_20_Paragraph_20_Font"><text:span text:style-name="T6">the important things are written in bold</text:span></text:span><text:span text:style-name="Default_20_Paragraph_20_Font"><text:span text:style-name="T5">.</text:span></text:span></text:p>
      <text:p text:style-name="Standard"/>
      <text:p text:style-name="Standard"/>
      <text:p text:style-name="Standard"/>
      <text:p text:style-name="Standard"/>
      <text:p text:style-name="P7">For modders:</text:p>
      <text:p text:style-name="P8">There is a separate document in the "docs" folder going into details on how to make mods.</text:p>
      <text:p text:style-name="P9"/>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h text:style-name="Heading_20_1" text:outline-level="1">Contents</text:h>
          </text:index-title>
          <text:p text:style-name="P10"><text:a xlink:type="simple" xlink:href="#__RefHeading___Toc1429_1429397617" office:name="Installation &amp; First Time Setup" text:style-name="Index_20_Link" text:visited-style-name="Index_20_Link">Installation &amp; First Time Setup<text:tab/>3</text:a></text:p>
          <text:p text:style-name="P11"><text:a xlink:type="simple" xlink:href="#__RefHeading___Toc2425_623082371" office:name="What you need" text:style-name="Index_20_Link" text:visited-style-name="Index_20_Link">What you need<text:tab/>3</text:a></text:p>
          <text:p text:style-name="P11"><text:a xlink:type="simple" xlink:href="#__RefHeading___Toc2427_623082371" office:name="Windows" text:style-name="Index_20_Link" text:visited-style-name="Index_20_Link">Windows<text:tab/>4</text:a></text:p>
          <text:p text:style-name="P11"><text:a xlink:type="simple" xlink:href="#__RefHeading___Toc8250_956099167" office:name="Mac" text:style-name="Index_20_Link" text:visited-style-name="Index_20_Link">Mac<text:tab/>5</text:a></text:p>
          <text:p text:style-name="P11"><text:a xlink:type="simple" xlink:href="#__RefHeading___Toc2449_623082371" office:name="Linux" text:style-name="Index_20_Link" text:visited-style-name="Index_20_Link">Linux<text:tab/>7</text:a></text:p>
          <text:p text:style-name="P11"><text:a xlink:type="simple" xlink:href="#__RefHeading___Toc2982_469255244" office:name="Android" text:style-name="Index_20_Link" text:visited-style-name="Index_20_Link">Android<text:tab/>9</text:a></text:p>
          <text:p text:style-name="P11"><text:a xlink:type="simple" xlink:href="#__RefHeading___Toc8252_956099167" office:name="iOS / Web" text:style-name="Index_20_Link" text:visited-style-name="Index_20_Link">iOS / Web<text:tab/>10</text:a></text:p>
          <text:p text:style-name="P11"><text:a xlink:type="simple" xlink:href="#__RefHeading___Toc2461_623082371" office:name="Nintendo Switch" text:style-name="Index_20_Link" text:visited-style-name="Index_20_Link">Nintendo Switch<text:tab/>12</text:a></text:p>
          <text:p text:style-name="P10"><text:a xlink:type="simple" xlink:href="#__RefHeading___Toc1652_1429397617" office:name="Controls" text:style-name="Index_20_Link" text:visited-style-name="Index_20_Link">Controls<text:tab/>13</text:a></text:p>
          <text:p text:style-name="P11"><text:a xlink:type="simple" xlink:href="#__RefHeading___Toc1654_1429397617" office:name="Keyboard" text:style-name="Index_20_Link" text:visited-style-name="Index_20_Link">Keyboard<text:tab/>13</text:a></text:p>
          <text:p text:style-name="P11"><text:a xlink:type="simple" xlink:href="#__RefHeading___Toc1656_1429397617" office:name="XBox Controller" text:style-name="Index_20_Link" text:visited-style-name="Index_20_Link">XBox Controller<text:tab/>13</text:a></text:p>
          <text:p text:style-name="P11"><text:a xlink:type="simple" xlink:href="#__RefHeading___Toc1658_1429397617" office:name="Other Gamepads / Custom Keyboard bindings" text:style-name="Index_20_Link" text:visited-style-name="Index_20_Link">Other Gamepads / Custom Keyboard bindings<text:tab/>13</text:a></text:p>
          <text:p text:style-name="P10"><text:a xlink:type="simple" xlink:href="#__RefHeading___Toc1660_1429397617" office:name="Special Character Moves" text:style-name="Index_20_Link" text:visited-style-name="Index_20_Link">Special Character Moves<text:tab/>15</text:a></text:p>
          <text:p text:style-name="P11"><text:a xlink:type="simple" xlink:href="#__RefHeading___Toc885_250677539" office:name="Tails Assist" text:style-name="Index_20_Link" text:visited-style-name="Index_20_Link">Tails Assist<text:tab/>15</text:a></text:p>
          <text:p text:style-name="P11"><text:a xlink:type="simple" xlink:href="#__RefHeading___Toc887_250677539" office:name="Easier Flight Controls" text:style-name="Index_20_Link" text:visited-style-name="Index_20_Link">Easier Flight Controls<text:tab/>15</text:a></text:p>
          <text:p text:style-name="P11"><text:a xlink:type="simple" xlink:href="#__RefHeading___Toc889_250677539" office:name="Flight Cancel" text:style-name="Index_20_Link" text:visited-style-name="Index_20_Link">Flight Cancel<text:tab/>15</text:a></text:p>
          <text:p text:style-name="P10"><text:a xlink:type="simple" xlink:href="#__RefHeading___Toc1117_7661665" office:name="Game Options" text:style-name="Index_20_Link" text:visited-style-name="Index_20_Link">Game Options<text:tab/>16</text:a></text:p>
          <text:p text:style-name="P11"><text:a xlink:type="simple" xlink:href="#__RefHeading___Toc1119_766166511" office:name="Mod Options" text:style-name="Index_20_Link" text:visited-style-name="Index_20_Link">Mod Options<text:tab/>16</text:a></text:p>
          <text:p text:style-name="P11"><text:a xlink:type="simple" xlink:href="#__RefHeading___Toc1119_76616651" office:name="System" text:style-name="Index_20_Link" text:visited-style-name="Index_20_Link">System<text:tab/>16</text:a></text:p>
          <text:p text:style-name="P11"><text:a xlink:type="simple" xlink:href="#__RefHeading___Toc1119_7661665" office:name="Display" text:style-name="Index_20_Link" text:visited-style-name="Index_20_Link">Display<text:tab/>16</text:a></text:p>
          <text:p text:style-name="P11"><text:a xlink:type="simple" xlink:href="#__RefHeading___Toc1121_7661665" office:name="Audio" text:style-name="Index_20_Link" text:visited-style-name="Index_20_Link">Audio<text:tab/>17</text:a></text:p>
          <text:p text:style-name="P11"><text:a xlink:type="simple" xlink:href="#__RefHeading___Toc1123_7661665" office:name="Visuals" text:style-name="Index_20_Link" text:visited-style-name="Index_20_Link">Visuals<text:tab/>18</text:a></text:p>
          <text:p text:style-name="P11"><text:a xlink:type="simple" xlink:href="#__RefHeading___Toc1809_806507059" office:name="Gameplay" text:style-name="Index_20_Link" text:visited-style-name="Index_20_Link">Gameplay<text:tab/>18</text:a></text:p>
          <text:p text:style-name="P11"><text:a xlink:type="simple" xlink:href="#__RefHeading___Toc1811_806507059" office:name="Controls" text:style-name="Index_20_Link" text:visited-style-name="Index_20_Link">Controls<text:tab/>19</text:a></text:p>
          <text:p text:style-name="P11"><text:a xlink:type="simple" xlink:href="#__RefHeading___Toc1813_806507059" office:name="Tweaks" text:style-name="Index_20_Link" text:visited-style-name="Index_20_Link">Tweaks<text:tab/>20</text:a></text:p>
          <text:p text:style-name="P10"><text:a xlink:type="simple" xlink:href="#__RefHeading___Toc1108_7661665" office:name="Troubleshooting" text:style-name="Index_20_Link" text:visited-style-name="Index_20_Link">Troubleshooting<text:tab/>22</text:a></text:p>
          <text:p text:style-name="P11"><text:a xlink:type="simple" xlink:href="#__RefHeading___Toc1649_1429397617" office:name="Graphics" text:style-name="Index_20_Link" text:visited-style-name="Index_20_Link">Graphics<text:tab/>22</text:a></text:p>
          <text:p text:style-name="P11"><text:a xlink:type="simple" xlink:href="#__RefHeading___Toc1110_7661665" office:name="Crash on Startup" text:style-name="Index_20_Link" text:visited-style-name="Index_20_Link">Crash on Startup<text:tab/>22</text:a></text:p>
          <text:p text:style-name="P10"><text:a xlink:type="simple" xlink:href="#__RefHeading___Toc1689_1228092597" office:name="Mods" text:style-name="Index_20_Link" text:visited-style-name="Index_20_Link">Mods<text:tab/>23</text:a></text:p>
          <text:p text:style-name="P11"><text:a xlink:type="simple" xlink:href="#__RefHeading___Toc2524_694512780" office:name="Where to get Mods?" text:style-name="Index_20_Link" text:visited-style-name="Index_20_Link">Where to get Mods?<text:tab/>23</text:a></text:p>
          <text:p text:style-name="P11"><text:a xlink:type="simple" xlink:href="#__RefHeading___Toc2204_1711813851" office:name="Installation of Mods" text:style-name="Index_20_Link" text:visited-style-name="Index_20_Link">Installation of Mods<text:tab/>23</text:a></text:p>
          <text:p text:style-name="P11"><text:a xlink:type="simple" xlink:href="#__RefHeading___Toc2204_17118138511" office:name="Mod Options" text:style-name="Index_20_Link" text:visited-style-name="Index_20_Link">Mod Options<text:tab/>24</text:a></text:p>
          <text:p text:style-name="P10"><text:a xlink:type="simple" xlink:href="#__RefHeading___Toc1662_1429397617" office:name="About this Fan Game Remaster" text:style-name="Index_20_Link" text:visited-style-name="Index_20_Link">About this Fan Game Remaster<text:tab/>25</text:a></text:p>
          <text:p text:style-name="P10"><text:a xlink:type="simple" xlink:href="#__RefHeading___Toc1664_1429397617" office:name="Credits and Thanks" text:style-name="Index_20_Link" text:visited-style-name="Index_20_Link">Credits and Thanks<text:tab/>25</text:a></text:p>
        </text:index-body>
      </text:table-of-content>
      <text:p text:style-name="Standard"/>
      <text:h text:style-name="P12" text:outline-level="1"><text:bookmark-start text:name="__RefHeading___Toc1429_1429397617"/><text:alphabetical-index-mark text:string-value="Installation"/>Installation <text:span text:style-name="T7">&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13">To play Sonic 3 A.I.R., you need two things:</text:p>
      <text:p text:style-name="P13"/>
      <text:list text:style-name="L2">
        <text:list-item>
          <text:p text:style-name="P14"><text:span text:style-name="T8">The original combined </text:span><text:span text:style-name="T9">Sonic 3 &amp; Knuckles</text:span><text:span text:style-name="T8"> ROM</text:span> <text:span text:style-name="T8">file</text:span><text:span text:style-name="T10"> </text:span><text:span text:style-name="T11">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ersion of Sonic 3 &amp; Knuckles</text:span></text:span></text:a><text:span text:style-name="Default_20_Paragraph_20_Font"><text:span text:style-name="T12"> that i</text:span></text:span><text:span text:style-name="Default_20_Paragraph_20_Font"><text:span text:style-name="T13">s a </text:span></text:span><text:span text:style-name="Default_20_Paragraph_20_Font"><text:span text:style-name="T14">part of </text:span></text:span><text:span text:style-name="Default_20_Paragraph_20_Font"><text:span text:style-name="T15">the </text:span></text:span><text:span text:style-name="Default_20_Paragraph_20_Font"><text:span text:style-name="T16">SEGA </text:span></text:span><text:span text:style-name="Default_20_Paragraph_20_Font"><text:span text:style-name="T17">Mega Drive &amp; </text:span></text:span><text:span text:style-name="Default_20_Paragraph_20_Font"><text:span text:style-name="T16">Genesis Classic </text:span></text:span><text:span text:style-name="Default_20_Paragraph_20_Font"><text:span text:style-name="T17">Collection</text:span></text:span><text:span text:style-name="Default_20_Paragraph_20_Font"><text:span text:style-name="T18">. </text:span></text:span><text:span text:style-name="Default_20_Paragraph_20_Font"><text:span text:style-name="T14">It</text:span></text:span><text:span text:style-name="Default_20_Paragraph_20_Font"><text:span text:style-name="T19">‘s needed because Sonic 3 A.I.R. is </text:span></text:span><text:span text:style-name="Default_20_Paragraph_20_Font"><text:span text:style-name="T14">loading large parts of game data from that </text:span></text:span><text:span text:style-name="Default_20_Paragraph_20_Font"><text:span text:style-name="T13">exact </text:span></text:span><text:span text:style-name="Default_20_Paragraph_20_Font"><text:span text:style-name="T14">ROM.</text:span></text:span><text:span text:style-name="Default_20_Paragraph_20_Font"><text:span text:style-name="T19"><text:line-break/><text:line-break/></text:span></text:span><text:span text:style-name="Default_20_Paragraph_20_Font"><text:span text:style-name="T13">I</text:span></text:span><text:span text:style-name="Default_20_Paragraph_20_Font"><text:span text:style-name="T19">f you </text:span></text:span><text:span text:style-name="Default_20_Paragraph_20_Font"><text:span text:style-name="T13">own</text:span></text:span><text:span text:style-name="Default_20_Paragraph_20_Font"><text:span text:style-name="T14"> </text:span></text:span><text:span text:style-name="Default_20_Paragraph_20_Font"><text:span text:style-name="T20">Sonic 3 &amp; Knuckles </text:span></text:span><text:span text:style-name="Default_20_Paragraph_20_Font"><text:span text:style-name="T21">on Steam</text:span></text:span><text:span text:style-name="Default_20_Paragraph_20_Font"><text:span text:style-name="T22"> (as part of the SEGA Genesis &amp; Mega Drive</text:span></text:span><text:span text:style-name="Default_20_Paragraph_20_Font"><text:span text:style-name="T23"> </text:span></text:span><text:span text:style-name="Default_20_Paragraph_20_Font"><text:span text:style-name="T22">Classics)</text:span></text:span><text:span text:style-name="Default_20_Paragraph_20_Font"><text:span text:style-name="T13">, then make sure to down</text:span></text:span><text:span text:style-name="Default_20_Paragraph_20_Font"><text:span text:style-name="T14">load / install it on your PC or Mac.<text:line-break/><text:line-break/></text:span></text:span><text:span text:style-name="Default_20_Paragraph_20_Font"><text:span text:style-name="T13">Unfortunately, this game </text:span></text:span><text:span text:style-name="Default_20_Paragraph_20_Font"><text:span text:style-name="T22">was</text:span></text:span><text:span text:style-name="Default_20_Paragraph_20_Font"><text:span text:style-name="T13"> removed from the Steam shop on May 20th, 2022.<text:line-break/></text:span></text:span><text:span text:style-name="Default_20_Paragraph_20_Font"><text:span text:style-name="T22">Since then</text:span></text:span><text:span text:style-name="Default_20_Paragraph_20_Font"><text:span text:style-name="T13">,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24">alternatives</text:span></text:span></text:a><text:span text:style-name="Default_20_Paragraph_20_Font"><text:span text:style-name="T13"> might work for you.<text:line-break/><text:line-break/></text:span></text:span><text:span text:style-name="Default_20_Paragraph_20_Font"><text:span text:style-name="T25">N</text:span></text:span><text:span text:style-name="Default_20_Paragraph_20_Font"><text:span text:style-name="T26">ote that the developers of Sonic 3 A.I.R. can't give any support on getting the ROM.</text:span></text:span><text:span text:style-name="Default_20_Paragraph_20_Font"><text:span text:style-name="T13"><text:line-break/></text:span></text:span></text:p>
          <text:p text:style-name="P15"><text:span text:style-name="Default_20_Paragraph_20_Font"><text:span text:style-name="T27"/></text:span></text:p>
        </text:list-item>
        <text:list-item>
          <text:p text:style-name="P16"><text:span text:style-name="Default_20_Paragraph_20_Font"><text:span text:style-name="T28">The Sonic 3 A.I.R. game </text:span></text:span><text:span text:style-name="Default_20_Paragraph_20_Font"><text:span text:style-name="T15">app from </text:span></text:span><text:a xlink:type="simple" xlink:href="https://sonic3air.org/" text:style-name="Internet_20_link" text:visited-style-name="Visited_20_Internet_20_Link"><text:span text:style-name="Default_20_Paragraph_20_Font"><text:span text:style-name="T20">sonic3air.org</text:span></text:span></text:a><text:span text:style-name="Default_20_Paragraph_20_Font"><text:span text:style-name="T15">.<text:line-break/></text:span></text:span><text:span text:style-name="Default_20_Paragraph_20_Font"><text:span text:style-name="T14">C</text:span></text:span><text:span text:style-name="Default_20_Paragraph_20_Font"><text:span text:style-name="T15">hoose the right download, </text:span></text:span><text:span text:style-name="Default_20_Paragraph_20_Font"><text:span text:style-name="T14">depending</text:span></text:span><text:span text:style-name="Default_20_Paragraph_20_Font"><text:span text:style-name="T15"> </text:span></text:span><text:span text:style-name="Default_20_Paragraph_20_Font"><text:span text:style-name="T14">on</text:span></text:span><text:span text:style-name="Default_20_Paragraph_20_Font"><text:span text:style-name="T15"> your platform. </text:span></text:span><text:span text:style-name="Default_20_Paragraph_20_Font"><text:span text:style-name="T29">There‘s downloads for </text:span></text:span><text:span text:style-name="Default_20_Paragraph_20_Font"><text:span text:style-name="T30">Windows</text:span></text:span><text:span text:style-name="Default_20_Paragraph_20_Font"><text:span text:style-name="T29">, </text:span></text:span><text:span text:style-name="Default_20_Paragraph_20_Font"><text:span text:style-name="T30">Linux</text:span></text:span><text:span text:style-name="Default_20_Paragraph_20_Font"><text:span text:style-name="T29"> and </text:span></text:span><text:span text:style-name="Default_20_Paragraph_20_Font"><text:span text:style-name="T30">Android</text:span></text:span><text:span text:style-name="Default_20_Paragraph_20_Font"><text:span text:style-name="T29">, and links to download pages for </text:span></text:span><text:span text:style-name="Default_20_Paragraph_20_Font"><text:span text:style-name="T30">Mac</text:span></text:span><text:span text:style-name="Default_20_Paragraph_20_Font"><text:span text:style-name="T29">, </text:span></text:span><text:span text:style-name="Default_20_Paragraph_20_Font"><text:span text:style-name="T30">iOS</text:span></text:span><text:span text:style-name="Default_20_Paragraph_20_Font"><text:span text:style-name="T29"> and </text:span></text:span><text:span text:style-name="Default_20_Paragraph_20_Font"><text:span text:style-name="T30">Switch</text:span></text:span><text:span text:style-name="Default_20_Paragraph_20_Font"><text:span text:style-name="T29">.<text:line-break/><text:line-break/>Find more information about installation on the various platforms below.</text:span></text:span></text:p>
        </text:list-item>
      </text:list>
      <text:p text:style-name="P17"/>
      <text:p text:style-name="Standard"/>
      <text:p text:style-name="Standard"/>
      <text:p text:style-name="Standard"/>
      <text:h text:style-name="P18" text:outline-level="2"/>
      <text:h text:style-name="P19" text:outline-level="2"><text:bookmark-start text:name="__RefHeading___Toc2427_623082371"/>Windows<text:bookmark-end text:name="__RefHeading___Toc2427_623082371"/></text:h>
      <text:h text:style-name="P20" text:outline-level="3"><text:bookmark-start text:name="__RefHeading___Toc2429_623082371"/><text:span text:style-name="T31">Install </text:span><text:span text:style-name="T32">Sonic 3 A.I.R.</text:span><text:bookmark-end text:name="__RefHeading___Toc2429_623082371"/></text:h>
      <text:p text:style-name="P21"/>
      <text:p text:style-name="P21">Prerequisites</text:p>
      <text:list text:style-name="L3">
        <text:list-item>
          <text:p text:style-name="P22">You need <text:span text:style-name="Default_20_Paragraph_20_Font"><text:span text:style-name="T33">Windows 7 or higher</text:span></text:span> to play,<text:span text:style-name="T34"> at least </text:span><text:span text:style-name="T35">Windows 10</text:span><text:span text:style-name="T34"> is recommended.</text:span></text:p>
        </text:list-item>
        <text:list-item>
          <text:p text:style-name="P22">A dedicated Nvidia / AMD graphics card or a not too old Intel graphics card (HD 3000 or above) or later is recommended<text:span text:style-name="T34">, with up-to-date drivers. </text:span><text:span text:style-name="T36">Otherwise you might need to switch to </text:span><text:a xlink:type="simple" xlink:href="#6.Troubleshooting|outline" office:target-frame-name="_top" xlink:show="replace" text:style-name="Internet_20_link" text:visited-style-name="Visited_20_Internet_20_Link"><text:span text:style-name="T36">fail-safe mode</text:span></text:a><text:span text:style-name="T36">.</text:span></text:p>
        </text:list-item>
        <text:list-item>
          <text:p text:style-name="P23"><text:span text:style-name="T37">And as mentioned, </text:span><text:span text:style-name="T38">t</text:span><text:span text:style-name="T37">he Sonic 3 &amp; Knuckles Steam ROM is a must as well.</text:span></text:p>
        </text:list-item>
      </text:list>
      <text:p text:style-name="P24"/>
      <text:p text:style-name="P25">How to install</text:p>
      <text:list xml:id="list95612253953553" text:continue-numbering="true" text:style-name="L3">
        <text:list-item>
          <text:p text:style-name="P26">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26"><text:span text:style-name="T39">M</text:span>ake sure you really unpacked it, and don‘t start the game directly from inside the ZIP file. This will only lead to an error message box <text:span text:style-name="T40">like </text:span>"<text:span text:style-name="Default_20_Paragraph_20_Font"><text:span text:style-name="T41">Script execution completely stopped because call stack was emptied"</text:span></text:span><text:span text:style-name="Default_20_Paragraph_20_Font"><text:span text:style-name="T42"> or saying that discord_game_sdk.dll could not be found</text:span></text:span><text:span text:style-name="Default_20_Paragraph_20_Font"><text:span text:style-name="T41">.</text:span></text:span></text:p>
        </text:list-item>
      </text:list>
      <text:p text:style-name="P24"/>
      <text:p text:style-name="Standard"><text:span text:style-name="T43">Add</text:span><text:span text:style-name="T3"> the Sonic 3 &amp; Knuckles ROM</text:span></text:p>
      <text:list xml:id="list680701007" text:style-name="L4">
        <text:list-item>
          <text:p text:style-name="P27">If you have the Steam version of Sonic 3 &amp; Knuckles installed on your hard disk, no further steps are required. Sonic 3 A.I.R. can usually find it by itself and load the ROM data from there.</text:p>
        </text:list-item>
        <text:list-item>
          <text:p text:style-name="P28"><text:span text:style-name="T38">If not,</text:span><text:span text:style-name="T44"> Sonic 3 A.I.R. will ask you for the ROM on first startup.<text:line-break/>The usual location of the ROM file is this:<text:line-break/></text:span><text:span text:style-name="Default_20_Paragraph_20_Font"><text:span text:style-name="T45">C:\Program Files\Steam\steamapps\common\Sega Classics\<text:line-break/>uncompressed ROMs\Sonic_Knuckles_wSonic3.bin</text:span></text:span></text:p>
        </text:list-item>
        <text:list-item>
          <text:p text:style-name="P29"><text:span text:style-name="Default_20_Paragraph_20_Font">Or </text:span><text:span text:style-name="Default_20_Paragraph_20_Font"><text:span text:style-name="T46">y</text:span></text:span>ou can try to find it using Steam‘s own functionality to browse the local files as follows:</text:p>
        </text:list-item>
      </text:list>
      <text:list text:style-name="L5">
        <text:list-item>
          <text:list>
            <text:list-item>
              <text:p text:style-name="P30"><text:span text:style-name="Default_20_Paragraph_20_Font"><text:span text:style-name="T46">O</text:span></text:span><text:span text:style-name="Default_20_Paragraph_20_Font"><text:span text:style-name="T44">pen your Steam Library </text:span></text:span><text:span text:style-name="Default_20_Paragraph_20_Font"><text:span text:style-name="T47">and </text:span></text:span><text:span text:style-name="Default_20_Paragraph_20_Font"><text:span text:style-name="T48">m</text:span></text:span><text:span text:style-name="Default_20_Paragraph_20_Font"><text:span text:style-name="T44">ake sure Sonic 3 &amp; Knuckles is installed</text:span></text:span></text:p>
            </text:list-item>
            <text:list-item>
              <text:p text:style-name="P30"><text:span text:style-name="Default_20_Paragraph_20_Font"><text:span text:style-name="T46">R</text:span></text:span><text:span text:style-name="Default_20_Paragraph_20_Font"><text:span text:style-name="T44">ight-click "SEGA Mega Drive &amp; Genesis Classics" and select "Properties…"</text:span></text:span></text:p>
            </text:list-item>
            <text:list-item>
              <text:p text:style-name="P30"><text:span text:style-name="Default_20_Paragraph_20_Font"><text:span text:style-name="T44">A new menu will pop up, navigate to "Local Files" there and click the "Browse" button in the upper right</text:span></text:span></text:p>
            </text:list-item>
            <text:list-item>
              <text:p text:style-name="P30"><text:span text:style-name="Default_20_Paragraph_20_Font"><text:span text:style-name="T44">This will take you to the installation folder of the SEGA Classics, where you can find the game ROMs inside the sub-folder named "uncompressed ROMs"</text:span></text:span></text:p>
            </text:list-item>
            <text:list-item>
              <text:p text:style-name="P30"><text:span text:style-name="Default_20_Paragraph_20_Font"><text:span text:style-name="T44">Select the file "Sonic_Knuckles_wSonic3.bin" there - that's the Sonic 3 &amp; Knuckles ROM.</text:span></text:span></text:p>
            </text:list-item>
          </text:list>
        </text:list-item>
      </text:list>
      <text:p text:style-name="P31"><text:span text:style-name="Default_20_Paragraph_20_Font"/></text:p>
      <text:h text:style-name="P20" text:outline-level="3"><text:bookmark-start text:name="__RefHeading___Toc2431_623082371"/>Start Sonic 3 A.I.R.<text:bookmark-end text:name="__RefHeading___Toc2431_623082371"/></text:h>
      <text:p text:style-name="P32">To start the game, just double-click the <text:span text:style-name="Default_20_Paragraph_20_Font"><text:span text:style-name="T3">"Sonic3AIR.exe" file</text:span></text:span>. Note that the .exe file extension might be hidden on your PC.</text:p>
      <text:p text:style-name="P32"/>
      <text:p text:style-name="P32"><draw:frame draw:style-name="fr1" draw:name="Bild45" text:anchor-type="paragraph" svg:x="9.813cm" svg:y="-0.032cm" svg:width="6.934cm" style:rel-width="scale" svg:height="2.242cm" style:rel-height="scale" draw:z-index="3"><draw:image xlink:href="Pictures/100000010000033E0000010C878628DE.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33"/>
      <text:h text:style-name="Heading_20_3" text:outline-level="3"><text:bookmark-start text:name="__RefHeading___Toc2433_623082371"/>Got technical issues?<text:bookmark-end text:name="__RefHeading___Toc2433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35"><text:span text:style-name="Default_20_Paragraph_20_Font"><text:span text:style-name="T41"/></text:span></text:p>
      <text:h text:style-name="Heading_20_3" text:outline-level="3"><text:bookmark-start text:name="__RefHeading___Toc2435_623082371"/><text:soft-page-break/><text:span text:style-name="T32">Where‘s your </text:span><text:span text:style-name="T49">s</text:span>aved data<text:bookmark-end text:name="__RefHeading___Toc2435_623082371"/></text:h>
      <text:p text:style-name="P32"><text:span text:style-name="Default_20_Paragraph_20_Font"><text:span text:style-name="T41">Sonic 3 A.I.R. saves all your settings, saves, mods etc. in a </text:span></text:span><text:span text:style-name="Default_20_Paragraph_20_Font"><text:span text:style-name="T50">separate folder</text:span></text:span><text:span text:style-name="Default_20_Paragraph_20_Font"><text:span text:style-name="T41">. This way, it‘s safe to completely delete the game installation and replace with another one when an update comes out.<text:line-break/></text:span></text:span></text:p>
      <text:p text:style-name="P36">To get to the saved data folder:</text:p>
      <text:list text:style-name="L6">
        <text:list-item>
          <text:p text:style-name="P37"><text:span text:style-name="Default_20_Paragraph_20_Font"><text:span text:style-name="T41">Open the Windows </text:span></text:span><text:span text:style-name="Default_20_Paragraph_20_Font"><text:span text:style-name="T51">File </text:span></text:span><text:span text:style-name="Default_20_Paragraph_20_Font"><text:span text:style-name="T41">Explorer, copy the following into the address line and press Enter:<text:line-break/></text:span></text:span><text:span text:style-name="Default_20_Paragraph_20_Font"><text:span text:style-name="T52">%appdata%\Sonic3AIR</text:span></text:span></text:p>
        </text:list-item>
        <text:list-item>
          <text:p text:style-name="P37">Alternatively, do a right-click into the running game and select the option "Open saved data folder" there.</text:p>
        </text:list-item>
      </text:list>
      <text:p text:style-name="P32"/>
      <text:p text:style-name="P38"><text:span text:style-name="Default_20_Paragraph_20_Font"><text:span text:style-name="T53">Option for a portable installation:</text:span></text:span></text:p>
      <text:p text:style-name="P38"><text:span text:style-name="T54">If you prefer to use a saved data folder right inside the game installation, </text:span><text:span text:style-name="Default_20_Paragraph_20_Font"><text:span text:style-name="T54">simply create a folder "savedata" in there, i.e. right next to "Sonic3AIR.exe".<text:line-break/>If this exists, it will serve as the location where the game stores your data.</text:span></text:span></text:p>
      <text:p text:style-name="P39"/>
      <text:h text:style-name="P40" text:outline-level="3"><text:bookmark-start text:name="__RefHeading___Toc2437_623082371"/><text:span text:style-name="Default_20_Paragraph_20_Font">Updat</text:span><text:span text:style-name="Default_20_Paragraph_20_Font"><text:span text:style-name="T31">e</text:span></text:span> Sonic 3 A.I.R.<text:bookmark-end text:name="__RefHeading___Toc2437_623082371"/></text:h>
      <text:p text:style-name="P35">To update <text:span text:style-name="T4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55">Only exception to this is if you opted for a portable installation that includes the saved data, as described in the "Option for a portable installation" box </text:span><text:span text:style-name="T56">above</text:span><text:span text:style-name="T55">.</text:span></text:p>
      <text:p text:style-name="P41"/>
      <text:p text:style-name="P35">To be on the safe side, here‘s the recommended steps for updating:</text:p>
      <text:list text:style-name="L7">
        <text:list-item>
          <text:list>
            <text:list-item>
              <text:p text:style-name="P4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42"><text:span text:style-name="Default_20_Paragraph_20_Font"><text:span text:style-name="T3">Start the new version</text:span></text:span> once, to make sure your settings and save games are still present.</text:p>
            </text:list-item>
            <text:list-item>
              <text:p text:style-name="P42">If everything looks good so far, it‘s safe to delete the old game installation now.</text:p>
            </text:list-item>
            <text:list-item>
              <text:p text:style-name="P42">Have fun with the update!</text:p>
            </text:list-item>
          </text:list>
        </text:list-item>
      </text:list>
      <text:p text:style-name="P24"/>
      <text:p text:style-name="P24"/>
      <text:p text:style-name="P43"><text:bookmark-end text:name="_Hlk621518651"/></text:p>
      <text:p text:style-name="P43"/>
      <text:h text:style-name="P44" text:outline-level="2"><text:bookmark-start text:name="__RefHeading___Toc8250_956099167"/>Mac<text:bookmark-end text:name="__RefHeading___Toc8250_956099167"/></text:h>
      <text:h text:style-name="P45" text:outline-level="3"><text:bookmark-start text:name="__RefHeading___Toc2421_623082371"/>Install <text:span text:style-name="T32">Sonic 3 A.I.R.</text:span><text:bookmark-end text:name="__RefHeading___Toc2421_623082371"/></text:h>
      <text:p text:style-name="P46"/>
      <text:p text:style-name="P47">Prerequisites</text:p>
      <text:list text:style-name="L8">
        <text:list-item>
          <text:p text:style-name="P48">You need <text:span text:style-name="Default_20_Paragraph_20_Font"><text:span text:style-name="T3">macOS 10.9 or later</text:span></text:span> to play. Any Mac made since 2009, along with a few older ones should be able to run the game.</text:p>
        </text:list-item>
      </text:list>
      <text:p text:style-name="P49"/>
      <text:p text:style-name="P47"><text:bookmark-start text:name="__RefHeading___Toc1104_766166511"/><text:span text:style-name="T32">How to i</text:span>nstall<text:bookmark-end text:name="__RefHeading___Toc1104_766166511"/></text:p>
      <text:list xml:id="list95611331567903" text:continue-numbering="true" text:style-name="L8">
        <text:list-item>
          <text:p text:style-name="P48"><text:span text:style-name="Default_20_Paragraph_20_Font"><text:span text:style-name="T41">Installation of the game is simple: Just </text:span></text:span><text:span text:style-name="Default_20_Paragraph_20_Font"><text:span text:style-name="T50">mount the downloaded DMG file</text:span></text:span><text:span text:style-name="Default_20_Paragraph_20_Font"><text:span text:style-name="T41"> and copy<text:line-break/>Sonic 3 AIR to your Applications directory. Easy as that.</text:span></text:span></text:p>
        </text:list-item>
      </text:list>
      <text:p text:style-name="P49"/>
      <text:p text:style-name="P49"><text:span text:style-name="T43">Add</text:span><text:span text:style-name="T3"> the Sonic 3 &amp; Knuckles ROM</text:span></text:p>
      <text:list text:style-name="L9">
        <text:list-item>
          <text:p text:style-name="P50">If you have the Steam version of Sonic 3 &amp; Knuckles installed on your hard disk, no further steps are required. <text:span text:style-name="T57">Just click the Steam button and </text:span>Sonic 3 A.I.R. can usually find it by itself and load the ROM data from there.</text:p>
        </text:list-item>
        <text:list-item>
          <text:p text:style-name="P51"><text:soft-page-break/><text:span text:style-name="T38">If not,</text:span><text:span text:style-name="T44"> Sonic 3 A.I.R. will ask you for the ROM on first startup.<text:line-break/>The usual location of the ROM file is this:<text:line-break/></text:span><text:span text:style-name="Default_20_Paragraph_20_Font"><text:span text:style-name="T45">~Library/Application Support/Steam/SteamApps/common/Sega Classics/<text:line-break/>uncompressed ROMs/Sonic_Knuckles_wSonic3.bin</text:span></text:span></text:p>
        </text:list-item>
        <text:list-item>
          <text:p text:style-name="P51"><text:span text:style-name="Default_20_Paragraph_20_Font">Or </text:span><text:span text:style-name="Default_20_Paragraph_20_Font"><text:span text:style-name="T46">y</text:span></text:span>ou can try to find it using Steam‘s own functionality to browse the local files as follows:</text:p>
        </text:list-item>
      </text:list>
      <text:list text:style-name="L10">
        <text:list-item>
          <text:list>
            <text:list-item>
              <text:list>
                <text:list-item>
                  <text:p text:style-name="P52"><text:span text:style-name="Default_20_Paragraph_20_Font"><text:span text:style-name="T46">O</text:span></text:span><text:span text:style-name="Default_20_Paragraph_20_Font"><text:span text:style-name="T44">pen your Steam Library </text:span></text:span><text:span text:style-name="Default_20_Paragraph_20_Font"><text:span text:style-name="T47">and </text:span></text:span><text:span text:style-name="Default_20_Paragraph_20_Font"><text:span text:style-name="T48">m</text:span></text:span><text:span text:style-name="Default_20_Paragraph_20_Font"><text:span text:style-name="T44">ake sure Sonic 3 &amp; Knuckles is installed</text:span></text:span></text:p>
                </text:list-item>
                <text:list-item>
                  <text:p text:style-name="P52"><text:span text:style-name="Default_20_Paragraph_20_Font"><text:span text:style-name="T46">R</text:span></text:span><text:span text:style-name="Default_20_Paragraph_20_Font"><text:span text:style-name="T44">ight-click "SEGA Mega Drive &amp; Genesis Classics" and select "Properties…"</text:span></text:span></text:p>
                </text:list-item>
                <text:list-item>
                  <text:p text:style-name="P52"><text:span text:style-name="Default_20_Paragraph_20_Font"><text:span text:style-name="T44">A new menu will pop up, navigate to "Local Files" there and click the "Browse" button in the upper right</text:span></text:span></text:p>
                </text:list-item>
                <text:list-item>
                  <text:p text:style-name="P52"><text:span text:style-name="Default_20_Paragraph_20_Font"><text:span text:style-name="T44">This will take you to the installation folder of the SEGA Classics, where you can find the game ROMs inside the sub-folder named "uncompressed ROMs"</text:span></text:span></text:p>
                </text:list-item>
                <text:list-item>
                  <text:p text:style-name="P52"><text:span text:style-name="Default_20_Paragraph_20_Font">Select the file "Sonic_Knuckles_wSonic3.bin" there - that's the Sonic 3 &amp; Knuckles ROM</text:span></text:p>
                </text:list-item>
              </text:list>
            </text:list-item>
          </text:list>
        </text:list-item>
      </text:list>
      <text:p text:style-name="P53"><text:span text:style-name="Default_20_Paragraph_20_Font"><text:span text:style-name="T58"/></text:span></text:p>
      <text:h text:style-name="P45" text:outline-level="3"><text:bookmark-start text:name="__RefHeading___Toc2441_623082371"/>Start Sonic 3 A.I.R.<text:bookmark-end text:name="__RefHeading___Toc2441_623082371"/></text:h>
      <text:p text:style-name="P49">To start the game, just double-click the "Sonic 3 AIR" app.</text:p>
      <text:p text:style-name="P49"/>
      <text:h text:style-name="P45" text:outline-level="3"><text:bookmark-start text:name="__RefHeading___Toc2443_623082371"/>Got technical issues?<text:bookmark-end text:name="__RefHeading___Toc2443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49"><text:span text:style-name="Default_20_Paragraph_20_Font"><text:span text:style-name="T41"/></text:span></text:p>
      <text:h text:style-name="P45" text:outline-level="3"><text:bookmark-start text:name="__RefHeading___Toc2445_623082371"/><text:span text:style-name="T32">Where‘s your </text:span><text:span text:style-name="T49">s</text:span>aved data<text:bookmark-end text:name="__RefHeading___Toc2445_623082371"/></text:h>
      <text:p text:style-name="P49"><text:span text:style-name="Default_20_Paragraph_20_Font"><text:span text:style-name="T41">Sonic 3 A.I.R. saves all your settings, saves, mods etc. in a </text:span></text:span><text:span text:style-name="Default_20_Paragraph_20_Font"><text:span text:style-name="T50">separate folder</text:span></text:span><text:span text:style-name="Default_20_Paragraph_20_Font"><text:span text:style-name="T41">. This way, it‘s safe to completely delete the game installation and replace with another one when an update comes out.<text:line-break/></text:span></text:span></text:p>
      <text:p text:style-name="P54">To get to the saved data folder:</text:p>
      <text:list text:style-name="L11">
        <text:list-item>
          <text:p text:style-name="P55">Open the Finder, and hold the Option key while opening the "Go" menu.<text:line-break/>Then select "Library" and navigate to <text:span text:style-name="Default_20_Paragraph_20_Font"><text:span text:style-name="T52">/Application Support/sonic3air/Sonic3AIR/</text:span></text:span></text:p>
        </text:list-item>
        <text:list-item>
          <text:p text:style-name="P55">Alternatively, do a right-click into the running game and select the option "Open mods folder…" there. Your save data is one folder up from the mods folder.</text:p>
        </text:list-item>
      </text:list>
      <text:p text:style-name="P49"/>
      <text:h text:style-name="P45" text:outline-level="3"><text:bookmark-start text:name="__RefHeading___Toc2447_623082371"/><text:span text:style-name="Default_20_Paragraph_20_Font">Updat</text:span><text:span text:style-name="Default_20_Paragraph_20_Font"><text:span text:style-name="T31">e</text:span></text:span> Sonic 3 A.I.R.<text:bookmark-end text:name="__RefHeading___Toc2447_623082371"/></text:h>
      <text:p text:style-name="P49">To update <text:span text:style-name="T44">from a previous Sonic 3 A.I.R.</text:span> version, all you need is to <text:span text:style-name="T59">replace</text:span> your existing Sonic 3 A.I.R. installation <text:span text:style-name="T57">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56"/>
      <text:p text:style-name="P56"/>
      <text:p text:style-name="P49">To be on the safe side, here‘s the recommended steps for updating:</text:p>
      <text:list text:style-name="L12">
        <text:list-item>
          <text:list>
            <text:list-item>
              <text:p text:style-name="P5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57"><text:span text:style-name="Default_20_Paragraph_20_Font"><text:span text:style-name="T3">Start the new version</text:span></text:span> once, to make sure your settings and save games are still present.</text:p>
            </text:list-item>
            <text:list-item>
              <text:p text:style-name="P57">If everything looks good so far, it‘s safe to delete the old game installation now.</text:p>
            </text:list-item>
            <text:list-item>
              <text:p text:style-name="P57">Have fun with the update!</text:p>
            </text:list-item>
          </text:list>
        </text:list-item>
      </text:list>
      <text:p text:style-name="P49"/>
      <text:p text:style-name="P49"/>
      <text:p text:style-name="P41"/>
      <text:h text:style-name="P58" text:outline-level="2"><text:bookmark-start text:name="__RefHeading___Toc2449_623082371"/><text:soft-page-break/>Linux<text:bookmark-end text:name="__RefHeading___Toc2449_623082371"/></text:h>
      <text:h text:style-name="P59" text:outline-level="3"><text:bookmark-start text:name="__RefHeading___Toc2451_623082371"/><text:span text:style-name="T31">Install </text:span><text:span text:style-name="T32">Sonic 3 A.I.R.</text:span><text:bookmark-end text:name="__RefHeading___Toc2451_623082371"/></text:h>
      <text:p text:style-name="P60"/>
      <text:p text:style-name="P60">Prerequisites</text:p>
      <text:list text:continue-list="list95612253953553" text:style-name="L3">
        <text:list-item>
          <text:p text:style-name="P61">You need a <text:span text:style-name="Default_20_Paragraph_20_Font"><text:span text:style-name="T3">64-bit Linux</text:span></text:span>, on a x86_64 PC (i.e. ARM CPUs are not supported).</text:p>
        </text:list-item>
        <text:list-item>
          <text:p text:style-name="P61">Sonic 3 A.I.R. has been tested on various distributions / desktops, including Ubuntu 20.04, Linux Mint 20 Cinnamon, Fedora 32 and Manjaro Xfce. However, there‘s no guarantee that all distributions work.</text:p>
        </text:list-item>
        <text:list-item>
          <text:p text:style-name="P61">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62"/>
      <text:p text:style-name="P63">How to install</text:p>
      <text:list xml:id="list95612488829015" text:continue-numbering="true" text:style-name="L3">
        <text:list-item>
          <text:p text:style-name="P61">After download, <text:span text:style-name="Default_20_Paragraph_20_Font"><text:span text:style-name="T3">unpack the .tar.gz</text:span></text:span> file to a place on your hard disk where you have full user rights.</text:p>
        </text:list-item>
        <text:list-item>
          <text:p text:style-name="P61">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58">bash ./setup_linux.sh</text:span></text:span></text:p>
        </text:list-item>
        <text:list-item>
          <text:p text:style-name="P61"><text:span text:style-name="Default_20_Paragraph_20_Font"><text:span text:style-name="T41">This will add a "Sonic 3 A.I.R." launcher link to the applications / start menu, if supported by your desktop (it should work for e.g. Gnome and Cinnamon, but does not for Xfce).</text:span></text:span></text:p>
        </text:list-item>
      </text:list>
      <text:p text:style-name="P62"/>
      <text:p text:style-name="P64"><text:span text:style-name="T43">Add</text:span><text:span text:style-name="T3"> the Sonic 3 &amp; Knuckles ROM</text:span></text:p>
      <text:list text:continue-list="list680701007" text:style-name="L4">
        <text:list-item>
          <text:p text:style-name="P65">If you have the Steam version of Sonic 3 &amp; Knuckles installed on your hard disk, no further steps are required. Sonic 3 A.I.R. can usually find it by itself and load the ROM data from there.</text:p>
        </text:list-item>
        <text:list-item>
          <text:p text:style-name="P66"><text:span text:style-name="T38">If not,</text:span><text:span text:style-name="T44"> Sonic 3 A.I.R. will ask you for the ROM on first startup.<text:line-break/>The usual location of the ROM file is this:<text:line-break/></text:span><text:span text:style-name="Default_20_Paragraph_20_Font"><text:span text:style-name="T45">~/.local/share/Steam/SteamApps/common/Sega Classics/<text:line-break/>uncompressed ROMs/Sonic_Knuckles_wSonic3.bin</text:span></text:span></text:p>
        </text:list-item>
        <text:list-item>
          <text:p text:style-name="P66"><text:span text:style-name="Default_20_Paragraph_20_Font">Or </text:span><text:span text:style-name="Default_20_Paragraph_20_Font"><text:span text:style-name="T46">y</text:span></text:span>ou can try to find it using Steam‘s own functionality to browse the local files as follows:</text:p>
        </text:list-item>
      </text:list>
      <text:list text:style-name="L13">
        <text:list-item>
          <text:list>
            <text:list-item>
              <text:list>
                <text:list-item>
                  <text:p text:style-name="P67"><text:span text:style-name="Default_20_Paragraph_20_Font"><text:span text:style-name="T46">O</text:span></text:span><text:span text:style-name="Default_20_Paragraph_20_Font"><text:span text:style-name="T44">pen your Steam Library </text:span></text:span><text:span text:style-name="Default_20_Paragraph_20_Font"><text:span text:style-name="T47">and </text:span></text:span><text:span text:style-name="Default_20_Paragraph_20_Font"><text:span text:style-name="T48">m</text:span></text:span><text:span text:style-name="Default_20_Paragraph_20_Font"><text:span text:style-name="T44">ake sure Sonic 3 &amp; Knuckles is installed</text:span></text:span></text:p>
                </text:list-item>
                <text:list-item>
                  <text:p text:style-name="P67"><text:span text:style-name="Default_20_Paragraph_20_Font"><text:span text:style-name="T46">R</text:span></text:span><text:span text:style-name="Default_20_Paragraph_20_Font"><text:span text:style-name="T44">ight-click "SEGA Mega Drive &amp; Genesis Classics" and select "Properties…"</text:span></text:span></text:p>
                </text:list-item>
                <text:list-item>
                  <text:p text:style-name="P67"><text:span text:style-name="Default_20_Paragraph_20_Font"><text:span text:style-name="T44">A new menu will pop up, navigate to "Local Files" there and click the "Browse" button in the upper right</text:span></text:span></text:p>
                </text:list-item>
                <text:list-item>
                  <text:p text:style-name="P67"><text:span text:style-name="Default_20_Paragraph_20_Font"><text:span text:style-name="T44">This will take you to the installation folder of the SEGA Classics, where you can find the game ROMs inside the sub-folder named "uncompressed ROMs"</text:span></text:span></text:p>
                </text:list-item>
                <text:list-item>
                  <text:p text:style-name="P67"><text:span text:style-name="Default_20_Paragraph_20_Font">Select the file "Sonic_Knuckles_wSonic3.bin" there - that's the Sonic 3 &amp; Knuckles ROM</text:span></text:p>
                </text:list-item>
              </text:list>
            </text:list-item>
          </text:list>
        </text:list-item>
      </text:list>
      <text:p text:style-name="P68"><text:span text:style-name="Default_20_Paragraph_20_Font"><text:span text:style-name="T58"/></text:span></text:p>
      <text:h text:style-name="P69" text:outline-level="3"><text:bookmark-start text:name="__RefHeading___Toc2453_623082371"/>Start Sonic 3 A.I.R.<text:bookmark-end text:name="__RefHeading___Toc2453_623082371"/></text:h>
      <text:p text:style-name="P70">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58">./sonic3air_linux</text:span></text:span></text:p>
      <text:p text:style-name="P70"><text:span text:style-name="Default_20_Paragraph_20_Font"><text:span text:style-name="T58"/></text:span></text:p>
      <text:p text:style-name="P70">If you added a Sonic 3 A.I.R. launcher link with the <text:span text:style-name="Default_20_Paragraph_20_Font"><text:span text:style-name="T3">setup_linux.sh</text:span></text:span> script, you can use that as well.</text:p>
      <text:p text:style-name="P62"/>
      <text:h text:style-name="P59" text:outline-level="3"><text:bookmark-start text:name="__RefHeading___Toc2455_623082371"/>Got technical issues?<text:bookmark-end text:name="__RefHeading___Toc2455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62"><text:span text:style-name="Default_20_Paragraph_20_Font"><text:span text:style-name="T41"/></text:span></text:p>
      <text:h text:style-name="P59" text:outline-level="3"><text:bookmark-start text:name="__RefHeading___Toc2457_623082371"/><text:soft-page-break/><text:span text:style-name="T32">Where‘s your </text:span><text:span text:style-name="T49">s</text:span>aved data<text:bookmark-end text:name="__RefHeading___Toc2457_623082371"/></text:h>
      <text:p text:style-name="P62"><text:span text:style-name="Default_20_Paragraph_20_Font"><text:span text:style-name="T41">Sonic 3 A.I.R. saves all your settings, saves, mods etc. in a </text:span></text:span><text:span text:style-name="Default_20_Paragraph_20_Font"><text:span text:style-name="T50">separate folder</text:span></text:span><text:span text:style-name="Default_20_Paragraph_20_Font"><text:span text:style-name="T41">. This way, it‘s safe to completely delete the game installation and replace with another one when an update comes out.<text:line-break/></text:span></text:span></text:p>
      <text:p text:style-name="P71">To get to the saved data folder:</text:p>
      <text:list text:style-name="L14">
        <text:list-item>
          <text:p text:style-name="P72">In Terminal or your favorite file browser, navigate to <text:span text:style-name="Default_20_Paragraph_20_Font"><text:span text:style-name="T52">~/.local/share/Sonic3AIR</text:span></text:span></text:p>
        </text:list-item>
        <text:list-item>
          <text:p text:style-name="P73"><text:span text:style-name="Default_20_Paragraph_20_Font">Alternatively, do a right-click into the running game and select the option "Open saved data folder" there.</text:span></text:p>
        </text:list-item>
        <text:list-item>
          <text:p text:style-name="P74"><text:span text:style-name="Default_20_Paragraph_20_Font"><text:span text:style-name="T60">Note that the flatpak version uses the following path instead: </text:span></text:span><text:span text:style-name="Default_20_Paragraph_20_Font"><text:span text:style-name="T61">/home/.var/app/org.sonic3air.Sonic3AIR/data/Sonic3AIR</text:span></text:span></text:p>
        </text:list-item>
      </text:list>
      <text:p text:style-name="P62"/>
      <text:p text:style-name="P75"><text:span text:style-name="Default_20_Paragraph_20_Font"><text:span text:style-name="T53">Option for a portable installation:</text:span></text:span></text:p>
      <text:p text:style-name="P76"><text:span text:style-name="T54">If you prefer to use a saved data folder right inside the game installation, </text:span><text:span text:style-name="Default_20_Paragraph_20_Font"><text:span text:style-name="T54">simply create a folder "savedata" in there, i.e. right next to "sonic3air_linux".<text:line-break/>If this exists, it will serve as the location where the game stores your data.</text:span></text:span></text:p>
      <text:p text:style-name="P77"/>
      <text:h text:style-name="P59" text:outline-level="3"><text:bookmark-start text:name="__RefHeading___Toc2459_623082371"/><text:span text:style-name="Default_20_Paragraph_20_Font">Updat</text:span><text:span text:style-name="Default_20_Paragraph_20_Font"><text:span text:style-name="T31">e</text:span></text:span> Sonic 3 A.I.R.<text:bookmark-end text:name="__RefHeading___Toc2459_623082371"/></text:h>
      <text:p text:style-name="P62">To update <text:span text:style-name="T4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55">Only exception to this is if you opted for a portable installation that includes the saved data, as described in the "Option for a portable installation" box </text:span><text:span text:style-name="T56">above</text:span><text:span text:style-name="T55">.</text:span></text:p>
      <text:p text:style-name="P78"/>
      <text:p text:style-name="P62">To be on the safe side, here‘s the recommended steps for updating:</text:p>
      <text:list text:style-name="L15">
        <text:list-item>
          <text:list>
            <text:list-item>
              <text:p text:style-name="P79">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79"><text:span text:style-name="Default_20_Paragraph_20_Font"><text:span text:style-name="T3">Start the new version</text:span></text:span> once, to make sure your settings and save games are still present.</text:p>
            </text:list-item>
            <text:list-item>
              <text:p text:style-name="P79">If everything looks good so far, it‘s safe to delete the old game installation now.</text:p>
            </text:list-item>
            <text:list-item>
              <text:p text:style-name="P79">Have fun with the update!</text:p>
            </text:list-item>
          </text:list>
        </text:list-item>
      </text:list>
      <text:p text:style-name="P62"/>
      <text:p text:style-name="P62"/>
      <text:p text:style-name="P62"/>
      <text:h text:style-name="P80" text:outline-level="2"><text:bookmark-end text:name="_Hlk6215186511"/></text:h>
      <text:h text:style-name="P81" text:outline-level="2"><text:bookmark-start text:name="__RefHeading___Toc2982_469255244"/>Android<text:bookmark-end text:name="__RefHeading___Toc2982_469255244"/></text:h>
      <text:h text:style-name="P82" text:outline-level="3"><text:bookmark-start text:name="__RefHeading___Toc2451_6230823711"/><text:span text:style-name="T31">Install </text:span><text:span text:style-name="T32">Sonic 3 A.I.R.</text:span><text:bookmark-end text:name="__RefHeading___Toc2451_6230823711"/></text:h>
      <text:p text:style-name="P83"/>
      <text:p text:style-name="P83">Prerequisites</text:p>
      <text:list text:continue-list="list95612488829015" text:style-name="L3">
        <text:list-item>
          <text:p text:style-name="P84">You need <text:span text:style-name="T62">Android 6.0 or above</text:span>.</text:p>
        </text:list-item>
        <text:list-item>
          <text:p text:style-name="P84">Sonic 3 A.I.R. has been tested on various <text:span text:style-name="T63">Android devices</text:span>. However, there‘s no guarantee that <text:span text:style-name="T63">it</text:span> work<text:span text:style-name="T62">s </text:span><text:span text:style-name="T64">well </text:span><text:span text:style-name="T62">on all of them</text:span>.</text:p>
        </text:list-item>
      </text:list>
      <text:p text:style-name="P85"/>
      <text:p text:style-name="P86">How to install</text:p>
      <text:list xml:id="list95612993319011" text:continue-numbering="true" text:style-name="L3">
        <text:list-item>
          <text:p text:style-name="P87"><text:span text:style-name="T65">Open the </text:span><text:a xlink:type="simple" xlink:href="https://sonic3air.org/" text:style-name="Internet_20_link" text:visited-style-name="Visited_20_Internet_20_Link"><text:span text:style-name="T65">download page</text:span></text:a><text:span text:style-name="T65"> on your Android device.</text:span></text:p>
        </text:list-item>
        <text:list-item>
          <text:p text:style-name="P87"><text:span text:style-name="T65">Download</text:span><text:span text:style-name="T66"> and install the </text:span><text:span text:style-name="T65">Android </text:span><text:span text:style-name="T66">APK.</text:span></text:p>
        </text:list-item>
        <text:list-item>
          <text:p text:style-name="P87">When the download has finished, launch the APK. (<text:span text:style-name="T67">M</text:span>ost browsers will ask you if you want to install the APK anyway).</text:p>
        </text:list-item>
        <text:list-item>
          <text:p text:style-name="P87">It's possible you get a warning about installing from an untrusted source. If so, follow the on-screen instructions to make <text:span text:style-name="T65">sure that </text:span>such installations are allowed. </text:p>
        </text:list-item>
      </text:list>
      <text:p text:style-name="P85"/>
      <text:p text:style-name="P88"><text:span text:style-name="T43">Add</text:span><text:span text:style-name="T3"> the Sonic 3 &amp; Knuckles ROM</text:span></text:p>
      <text:p text:style-name="P88"><text:span text:style-name="Default_20_Paragraph_20_Font">You need </text:span><text:span text:style-name="Default_20_Paragraph_20_Font"><text:span text:style-name="T46">to copy over the Sonic 3 &amp; Knuckles Steam ROM </text:span></text:span><text:span text:style-name="Default_20_Paragraph_20_Font"><text:span text:style-name="T68">using</text:span></text:span><text:span text:style-name="Default_20_Paragraph_20_Font"><text:span text:style-name="T46"> a PC or Mac. This is only required to be done once.<text:line-break/></text:span></text:span></text:p>
      <text:list text:style-name="L16">
        <text:list-item>
          <text:p text:style-name="P89"><text:span text:style-name="Default_20_Paragraph_20_Font"><text:span text:style-name="T69">Find</text:span></text:span><text:span text:style-name="Default_20_Paragraph_20_Font"><text:span text:style-name="T70"> the ROM</text:span></text:span><text:span text:style-name="Default_20_Paragraph_20_Font"><text:span text:style-name="T71"><text:line-break/></text:span></text:span><text:span text:style-name="Default_20_Paragraph_20_Font"><text:span text:style-name="T46">On your PC / Mac, first make sure </text:span></text:span><text:span text:style-name="Default_20_Paragraph_20_Font">you have the ROM from the Sonic 3 &amp; Knuckles Steam version </text:span><text:span text:style-name="Default_20_Paragraph_20_Font"><text:span text:style-name="T72">installed</text:span></text:span><text:span text:style-name="Default_20_Paragraph_20_Font">. </text:span><text:span text:style-name="Default_20_Paragraph_20_Font"><text:span text:style-name="T73">Then locate the ROM file as described</text:span></text:span><text:span text:style-name="Default_20_Paragraph_20_Font"><text:span text:style-name="T74"> in the </text:span></text:span><text:span text:style-name="Default_20_Paragraph_20_Font"><text:span text:style-name="T75">installation </text:span></text:span><text:span text:style-name="Default_20_Paragraph_20_Font"><text:span text:style-name="T74">sections for </text:span></text:span><text:a xlink:type="simple" xlink:href="#2.2.1.Install Sonic 3 A.I.R.|outline" text:style-name="Internet_20_link" text:visited-style-name="Visited_20_Internet_20_Link"><text:span text:style-name="Default_20_Paragraph_20_Font"><text:span text:style-name="T74">Windows</text:span></text:span></text:a><text:span text:style-name="Default_20_Paragraph_20_Font"><text:span text:style-name="T74">, </text:span></text:span><text:a xlink:type="simple" xlink:href="#2.3.1.Install Sonic 3 A.I.R.|outline" text:style-name="Internet_20_link" text:visited-style-name="Visited_20_Internet_20_Link"><text:span text:style-name="Default_20_Paragraph_20_Font"><text:span text:style-name="T74">Mac</text:span></text:span></text:a><text:span text:style-name="Default_20_Paragraph_20_Font"><text:span text:style-name="T74"> </text:span></text:span><text:span text:style-name="Default_20_Paragraph_20_Font"><text:span text:style-name="T75">or</text:span></text:span><text:span text:style-name="Default_20_Paragraph_20_Font"><text:span text:style-name="T74"> </text:span></text:span><text:a xlink:type="simple" xlink:href="#2.4.1.Install Sonic 3 A.I.R.|outline" text:style-name="Internet_20_link" text:visited-style-name="Visited_20_Internet_20_Link"><text:span text:style-name="Default_20_Paragraph_20_Font"><text:span text:style-name="T74">Linux</text:span></text:span></text:a><text:span text:style-name="Default_20_Paragraph_20_Font"><text:span text:style-name="T74">, </text:span></text:span><text:span text:style-name="Default_20_Paragraph_20_Font"><text:span text:style-name="T75">respectively</text:span></text:span><text:span text:style-name="Default_20_Paragraph_20_Font"><text:span text:style-name="T74">.<text:line-break/></text:span></text:span></text:p>
        </text:list-item>
        <text:list-item>
          <text:p text:style-name="P89"><text:span text:style-name="Default_20_Paragraph_20_Font"><text:span text:style-name="T69">Copy the ROM to your Android</text:span></text:span><text:span text:style-name="Default_20_Paragraph_20_Font"><text:span text:style-name="T76"> device</text:span></text:span><text:span text:style-name="Default_20_Paragraph_20_Font"><text:span text:style-name="T74"><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74">here</text:span></text:span></text:a><text:span text:style-name="Default_20_Paragraph_20_Font"><text:span text:style-name="T74">. It does not matter where exactly you copy the ROM file, it could be e.g. the Downloads folder.<text:line-break/></text:span></text:span></text:p>
        </text:list-item>
        <text:list-item>
          <text:p text:style-name="P90"><text:span text:style-name="Default_20_Paragraph_20_Font"><text:span text:style-name="T69">Method A: Open ROM using the file selection</text:span></text:span><text:span text:style-name="Default_20_Paragraph_20_Font"><text:span text:style-name="T68"><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77">If you can‘t find the ROM in the file selection dialog, double-check where exactly you placed it before.</text:span></text:span><text:span text:style-name="Default_20_Paragraph_20_Font"><text:span text:style-name="T68"><text:line-break/></text:span></text:span><text:span text:style-name="Default_20_Paragraph_20_Font"><text:span text:style-name="T78">Unfortunately, </text:span></text:span><text:span text:style-name="Default_20_Paragraph_20_Font"><text:span text:style-name="T79">file selection</text:span></text:span><text:span text:style-name="Default_20_Paragraph_20_Font"><text:span text:style-name="T78"> does not work on all devices - e.g. Android TVs just show a brief error instead of opening the file selection. So if this does not work for you, try method B.<text:line-break/></text:span></text:span></text:p>
        </text:list-item>
        <text:list-item>
          <text:p text:style-name="P91"><text:span text:style-name="Default_20_Paragraph_20_Font"><text:span text:style-name="T69">Method B: Launch the ROM file itself</text:span></text:span><text:span text:style-name="Default_20_Paragraph_20_Font"><text:span text:style-name="T68"><text:line-break/>Open a file management app, e.g. </text:span></text:span><text:span text:style-name="Default_20_Paragraph_20_Font"><text:span text:style-name="T80">the (often pre-installed) app called "Files", or any other ("FX", </text:span></text:span><text:span text:style-name="Default_20_Paragraph_20_Font"><text:span text:style-name="T81">"Samsung My Files", </text:span></text:span><text:span text:style-name="Default_20_Paragraph_20_Font"><text:span text:style-name="T80">"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82">not</text:span></text:span><text:span text:style-name="Default_20_Paragraph_20_Font"><text:span text:style-name="T80"> running in the background.<text:line-break/></text:span></text:span><text:span text:style-name="Default_20_Paragraph_20_Font"><text:span text:style-name="T83">If this still does not work, there‘s only method C left to try.</text:span></text:span></text:p>
          <text:p text:style-name="P89"><text:span text:style-name="Default_20_Paragraph_20_Font"><text:span text:style-name="T68"/></text:span></text:p>
        </text:list-item>
        <text:list-item>
          <text:p text:style-name="P92"><text:soft-page-break/><text:span text:style-name="Default_20_Paragraph_20_Font"><text:span text:style-name="T69">Method C: Directly access the save data folder</text:span></text:span><text:span text:style-name="Default_20_Paragraph_20_Font"><text:span text:style-name="T68"><text:line-break/></text:span></text:span><text:span text:style-name="Default_20_Paragraph_20_Font"><text:span text:style-name="T84">In short: </text:span></text:span><text:span text:style-name="Default_20_Paragraph_20_Font"><text:span text:style-name="T85">Use a file management app </text:span></text:span><text:span text:style-name="Default_20_Paragraph_20_Font"><text:span text:style-name="T84">to copy the ROM file from where you previously placed it in your device‘s file system to Sonic 3 A.I.R.‘s save data folder at </text:span></text:span><text:span text:style-name="Default_20_Paragraph_20_Font"><text:span text:style-name="T86">"Android/data/org.eukaryot.sonic3air/files"</text:span></text:span><text:span text:style-name="Default_20_Paragraph_20_Font"><text:span text:style-name="T87">.<text:line-break/>You can find the details on how to access the save data folder further below, in the "Where‘s your save</text:span></text:span><text:span text:style-name="Default_20_Paragraph_20_Font"><text:span text:style-name="T88">d</text:span></text:span><text:span text:style-name="Default_20_Paragraph_20_Font"><text:span text:style-name="T87"> data" section.</text:span></text:span><text:span text:style-name="Default_20_Paragraph_20_Font"><text:span text:style-name="T89"> </text:span></text:span><text:span text:style-name="T90">This method requires that the Sonic 3 A.I.R. app was started at least once before. And after you copied the file, </text:span><text:span text:style-name="T91">kill and restart</text:span><text:span text:style-name="T92"> Sonic 3 A.I.R.</text:span></text:p>
        </text:list-item>
      </text:list>
      <text:p text:style-name="P93"><text:span text:style-name="Default_20_Paragraph_20_Font"><text:span text:style-name="T58"/></text:span></text:p>
      <text:h text:style-name="P82" text:outline-level="3"><text:bookmark-start text:name="__RefHeading___Toc2453_6230823711"/>Start Sonic 3 A.I.R.<text:bookmark-end text:name="__RefHeading___Toc2453_6230823711"/></text:h>
      <text:p text:style-name="P85"><text:span text:style-name="T93">After installation, simply tap the Sonic 3 A.I.R</text:span>. <text:span text:style-name="T94">app icon on your home screen or in your apps menu.</text:span></text:p>
      <text:p text:style-name="P85"/>
      <text:h text:style-name="P82" text:outline-level="3"><text:bookmark-start text:name="__RefHeading___Toc2455_6230823711"/>Got technical issues?<text:bookmark-end text:name="__RefHeading___Toc2455_623082371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85"><text:span text:style-name="Default_20_Paragraph_20_Font"><text:span text:style-name="T41"/></text:span></text:p>
      <text:h text:style-name="P82" text:outline-level="3"><text:bookmark-start text:name="__RefHeading___Toc2457_6230823711"/><text:span text:style-name="T32">Where‘s your </text:span><text:span text:style-name="T49">s</text:span>aved data<text:bookmark-end text:name="__RefHeading___Toc2457_6230823711"/></text:h>
      <text:p text:style-name="P94"><text:span text:style-name="Default_20_Paragraph_20_Font"><text:span text:style-name="T95">With recent versions of Android, the </text:span></text:span><text:span text:style-name="Default_20_Paragraph_20_Font"><text:span text:style-name="T41">Sonic 3 A.I.R. save</text:span></text:span><text:span text:style-name="Default_20_Paragraph_20_Font"><text:span text:style-name="T95"> data folder (usually at</text:span></text:span><text:span text:style-name="Default_20_Paragraph_20_Font"><text:span text:style-name="T96"> </text:span></text:span><text:span text:style-name="Default_20_Paragraph_20_Font"><text:span text:style-name="T97">"Android/data/org.eukaryot.sonic3air/files"</text:span></text:span><text:span text:style-name="Default_20_Paragraph_20_Font"><text:span text:style-name="T98">) is either not directly accessible any more, or accessing it from outside of the game risks damaging save data</text:span></text:span><text:span text:style-name="Default_20_Paragraph_20_Font"><text:span text:style-name="T97">.</text:span></text:span></text:p>
      <text:p text:style-name="P94"><text:span text:style-name="Default_20_Paragraph_20_Font"><text:span text:style-name="T98"/></text:span></text:p>
      <text:p text:style-name="P94"><text:span text:style-name="Default_20_Paragraph_20_Font"><text:span text:style-name="T98">Instead, it's recommended to use the game's </text:span></text:span><text:span text:style-name="Default_20_Paragraph_20_Font"><text:span text:style-name="T99">integrated File Browser</text:span></text:span><text:span text:style-name="Default_20_Paragraph_20_Font"><text:span text:style-name="T98"> to safely access save data and mods, no matter which Android version you're using.<text:line-break/>The File Browser can be found in the Options menu's </text:span></text:span><text:span text:style-name="Default_20_Paragraph_20_Font"><text:span text:style-name="T99">System</text:span></text:span><text:span text:style-name="Default_20_Paragraph_20_Font"><text:span text:style-name="T98"> tab.</text:span></text:span></text:p>
      <text:p text:style-name="P95"><text:span text:style-name="Default_20_Paragraph_20_Font"><text:span text:style-name="T100"/></text:span></text:p>
      <text:p text:style-name="P96"><text:span text:style-name="Default_20_Paragraph_20_Font"><text:span text:style-name="T101">When launching the File Browser, you'll see the (at first empty) "mods" folder. This is where mod zip files are supposed to be imported to, if you want to use mods.</text:span></text:span></text:p>
      <text:p text:style-name="P96"><text:span text:style-name="Default_20_Paragraph_20_Font"><text:span text:style-name="T101"/></text:span></text:p>
      <text:p text:style-name="P96"><text:span text:style-name="Default_20_Paragraph_20_Font"><text:span text:style-name="T101">To access the rest of the save data, use the "Up" button to get into the save data root folder, where "settings.json" and other files can be found.</text:span></text:span></text:p>
      <text:p text:style-name="P94"><text:span text:style-name="Default_20_Paragraph_20_Font"><text:span text:style-name="T102"/></text:span></text:p>
      <text:h text:style-name="P82" text:outline-level="3"><text:bookmark-start text:name="__RefHeading___Toc2459_6230823711"/><text:span text:style-name="Default_20_Paragraph_20_Font">Updat</text:span><text:span text:style-name="Default_20_Paragraph_20_Font"><text:span text:style-name="T31">e</text:span></text:span> Sonic 3 A.I.R.<text:bookmark-end text:name="__RefHeading___Toc2459_6230823711"/></text:h>
      <text:p text:style-name="P97">Just install the new APK.</text:p>
      <text:p text:style-name="P98"><text:span text:style-name="T103">But do </text:span><text:span text:style-name="T104">not</text:span><text:span text:style-name="T103"> uninstall the old Sonic 3 A.I.R. version before, as this would delete your save files!</text:span></text:p>
      <text:p text:style-name="P99"/>
      <text:p text:style-name="P99"/>
      <text:p text:style-name="P99"/>
      <text:h text:style-name="P100" text:outline-level="2"><text:bookmark-start text:name="__RefHeading___Toc8252_956099167"/><text:span text:style-name="T105">iOS / </text:span><text:span text:style-name="T106">Web</text:span><text:bookmark-end text:name="__RefHeading___Toc8252_956099167"/></text:h>
      <text:h text:style-name="P101" text:outline-level="3"><text:span text:style-name="T31">Install </text:span><text:span text:style-name="T32">Sonic 3 A.I.R.</text:span></text:h>
      <text:p text:style-name="P102"/>
      <text:p text:style-name="P102">Prerequisites</text:p>
      <text:list text:continue-list="list95611331567903" text:style-name="L8">
        <text:list-item>
          <text:p text:style-name="P103">You need <text:span text:style-name="T107">an </text:span><text:span text:style-name="T108">iPhone or iPad</text:span><text:span text:style-name="T107"> </text:span><text:span text:style-name="T108">device that is running iOS 13</text:span><text:span text:style-name="T62"> or </text:span><text:span text:style-name="T57">later</text:span>.</text:p>
        </text:list-item>
      </text:list>
      <text:p text:style-name="P104"/>
      <text:p text:style-name="P104"><text:span text:style-name="T109">How to </text:span><text:span text:style-name="T110">run in b</text:span><text:span text:style-name="T111">r</text:span><text:span text:style-name="T110">owser</text:span></text:p>
      <text:list text:continue-numbering="true" text:style-name="L8">
        <text:list-item>
          <text:p text:style-name="P105">Visit the web <text:span text:style-name="T112">site</text:span> <text:span text:style-name="T112">for the current iOS / Web release and find the link at the bottom of the page to play in a browser. Web browsers require support for both WebGL and WebAssembly. This is available in most browsers released after 2017.</text:span></text:p>
        </text:list-item>
      </text:list>
      <text:p text:style-name="P104"><text:soft-page-break/></text:p>
      <text:p text:style-name="P104"><text:span text:style-name="T109">How to </text:span><text:span text:style-name="T113">install as an </text:span><text:span text:style-name="T114">iOS </text:span><text:span text:style-name="T113">app</text:span></text:p>
      <text:list text:continue-numbering="true" text:style-name="L8">
        <text:list-item>
          <text:p text:style-name="P106">Visit the web <text:span text:style-name="T112">site</text:span> <text:span text:style-name="T112">for the current iOS / Web release in Safari and tap the share button in the browser toolbar. In the share menu that appears, you’ll find an “Add to Home Screen” option. Use this to add the game icon to your home screen.</text:span></text:p>
        </text:list-item>
      </text:list>
      <text:p text:style-name="P107"/>
      <text:p text:style-name="P104"><text:span text:style-name="T43">Add</text:span><text:span text:style-name="T3"> the Sonic 3 &amp; Knuckles ROM</text:span></text:p>
      <text:list text:style-name="L17">
        <text:list-item>
          <text:p text:style-name="P108"><text:span text:style-name="Default_20_Paragraph_20_Font"><text:span text:style-name="T46">On your PC / Mac, first make sure </text:span></text:span><text:span text:style-name="Default_20_Paragraph_20_Font">you have the ROM from the Sonic 3 &amp; Knuckles Steam version </text:span><text:span text:style-name="Default_20_Paragraph_20_Font"><text:span text:style-name="T72">installed</text:span></text:span><text:span text:style-name="Default_20_Paragraph_20_Font">. </text:span><text:span text:style-name="Default_20_Paragraph_20_Font"><text:span text:style-name="T73">Then locate the ROM file as described</text:span></text:span><text:span text:style-name="Default_20_Paragraph_20_Font"><text:span text:style-name="T74"> in the </text:span></text:span><text:span text:style-name="Default_20_Paragraph_20_Font"><text:span text:style-name="T75">installation </text:span></text:span><text:span text:style-name="Default_20_Paragraph_20_Font"><text:span text:style-name="T74">sections for </text:span></text:span><text:a xlink:type="simple" xlink:href="#2.2.1.Install Sonic 3 A.I.R.|outline" text:style-name="Internet_20_link" text:visited-style-name="Visited_20_Internet_20_Link"><text:span text:style-name="Default_20_Paragraph_20_Font"><text:span text:style-name="T74">Windows</text:span></text:span></text:a><text:span text:style-name="Default_20_Paragraph_20_Font"><text:span text:style-name="T74">, </text:span></text:span><text:a xlink:type="simple" xlink:href="#2.3.1.Install Sonic 3 A.I.R.|outline" text:style-name="Internet_20_link" text:visited-style-name="Visited_20_Internet_20_Link"><text:span text:style-name="Default_20_Paragraph_20_Font"><text:span text:style-name="T74">Mac</text:span></text:span></text:a><text:span text:style-name="Default_20_Paragraph_20_Font"><text:span text:style-name="T74"> </text:span></text:span><text:span text:style-name="Default_20_Paragraph_20_Font"><text:span text:style-name="T75">or</text:span></text:span><text:span text:style-name="Default_20_Paragraph_20_Font"><text:span text:style-name="T74"> </text:span></text:span><text:a xlink:type="simple" xlink:href="#2.4.1.Install Sonic 3 A.I.R.|outline" text:style-name="Internet_20_link" text:visited-style-name="Visited_20_Internet_20_Link"><text:span text:style-name="Default_20_Paragraph_20_Font"><text:span text:style-name="T74">Linux</text:span></text:span></text:a><text:span text:style-name="Default_20_Paragraph_20_Font"><text:span text:style-name="T74">, </text:span></text:span><text:span text:style-name="Default_20_Paragraph_20_Font"><text:span text:style-name="T75">respectively</text:span></text:span><text:span text:style-name="Default_20_Paragraph_20_Font"><text:span text:style-name="T74">.</text:span></text:span></text:p>
        </text:list-item>
        <text:list-item>
          <text:p text:style-name="P108"><text:span text:style-name="Default_20_Paragraph_20_Font"><text:span text:style-name="T115">Copy the ROM to </text:span></text:span><text:span text:style-name="Default_20_Paragraph_20_Font"><text:span text:style-name="T116">somewhere that you can access from the Files app on your iOS device, such as your iCloud Drive, other cloud drive storage apps, or a USB drive if you have the ability to connect it to your device.</text:span></text:span></text:p>
        </text:list-item>
        <text:list-item>
          <text:p text:style-name="P108"><text:span text:style-name="Default_20_Paragraph_20_Font"><text:span text:style-name="T116">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109"><text:span text:style-name="Default_20_Paragraph_20_Font"><text:span text:style-name="T58"/></text:span></text:p>
      <text:h text:style-name="P101" text:outline-level="3"><text:bookmark-start text:name="__RefHeading___Toc2453_62308237111"/>Start Sonic 3 A.I.R.<text:bookmark-end text:name="__RefHeading___Toc2453_62308237111"/></text:h>
      <text:p text:style-name="P104"><text:span text:style-name="T93">After installation, simply tap the Sonic 3 A.I.R</text:span>. <text:span text:style-name="T94">app icon on your home screen.</text:span></text:p>
      <text:p text:style-name="P104"/>
      <text:h text:style-name="P101" text:outline-level="3"><text:bookmark-start text:name="__RefHeading___Toc2455_62308237111"/>Got technical issues?<text:bookmark-end text:name="__RefHeading___Toc2455_62308237111"/></text:h>
      <text:p text:style-name="P10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104"><text:span text:style-name="Default_20_Paragraph_20_Font"><text:span text:style-name="T41"/></text:span></text:p>
      <text:h text:style-name="P101" text:outline-level="3"><text:bookmark-start text:name="__RefHeading___Toc2457_62308237111"/><text:span text:style-name="T32">Where‘s your </text:span><text:span text:style-name="T49">s</text:span>aved data<text:bookmark-end text:name="__RefHeading___Toc2457_62308237111"/></text:h>
      <text:p text:style-name="P104"><text:span text:style-name="Default_20_Paragraph_20_Font"><text:span text:style-name="T117">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104"><text:span text:style-name="Default_20_Paragraph_20_Font"><text:span text:style-name="T102"/></text:span></text:p>
      <text:h text:style-name="P101" text:outline-level="3"><text:bookmark-start text:name="__RefHeading___Toc2459_62308237111"/><text:span text:style-name="Default_20_Paragraph_20_Font">Updat</text:span><text:span text:style-name="Default_20_Paragraph_20_Font"><text:span text:style-name="T31">e</text:span></text:span> Sonic 3 A.I.R.<text:bookmark-end text:name="__RefHeading___Toc2459_62308237111"/></text:h>
      <text:p text:style-name="P110">The iOS and Web version of the game is designed to work entirely without an internet connection. After the game has finished downloading, you currently cannot update it. <text:span text:style-name="T118">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11" text:outline-level="2"/>
      <text:h text:style-name="P112" text:outline-level="2"><text:bookmark text:name="_Hlk62151865111"/><text:bookmark-start text:name="__RefHeading___Toc2461_623082371"/>Nintendo Switch<text:bookmark-end text:name="__RefHeading___Toc2461_623082371"/></text:h>
      <text:h text:style-name="P113" text:outline-level="3"><text:bookmark-start text:name="__RefHeading___Toc2463_623082371"/><text:span text:style-name="T31">Install </text:span><text:span text:style-name="T32">Sonic 3 A.I.R.</text:span><text:bookmark-end text:name="__RefHeading___Toc2463_623082371"/></text:h>
      <text:p text:style-name="P114"/>
      <text:p text:style-name="P114">Prerequisites</text:p>
      <text:list text:continue-list="list95612993319011" text:style-name="L3">
        <text:list-item>
          <text:p text:style-name="P115">Make sure your Switch <text:a xlink:type="simple" xlink:href="https://switch.homebrew.guide/" text:style-name="Internet_20_link" text:visited-style-name="Visited_20_Internet_20_Link">can run homebrew</text:a>.</text:p>
        </text:list-item>
      </text:list>
      <text:p text:style-name="P116"/>
      <text:p text:style-name="P117">How to install</text:p>
      <text:list text:style-name="L18">
        <text:list-item>
          <text:p text:style-name="P118">Extract the contents of this ZIP to the root of your SD card.</text:p>
        </text:list-item>
        <text:list-item>
          <text:p text:style-name="P119"><text:span text:style-name="T119">Copy </text:span><text:span text:style-name="Default_20_Paragraph_20_Font"><text:span text:style-name="T120">Sonic_Knuckles_wSonic3.bin</text:span></text:span><text:span text:style-name="T119"> to </text:span><text:span text:style-name="Default_20_Paragraph_20_Font"><text:span text:style-name="T120">/switch/sonic3air</text:span></text:span><text:span text:style-name="T119"> on your Switch's SD card. After installing the Steam version, you should be able to find it in one of the directories listed in the section </text:span><text:span text:style-name="Default_20_Paragraph_20_Font"><text:span text:style-name="T121">Sonic 3 &amp; Knuckles Steam ROM</text:span></text:span><text:span text:style-name="T119">.</text:span></text:p>
        </text:list-item>
      </text:list>
      <text:p text:style-name="P120">If you installed Sega Classics to a different location, you'll need to check manually.</text:p>
      <text:list text:continue-numbering="true" text:style-name="L18">
        <text:list-item>
          <text:p text:style-name="P118">Extract the contents of this ZIP to the root of your SD card.</text:p>
        </text:list-item>
        <text:list-item>
          <text:p text:style-name="P119"><text:span text:style-name="T119">Copy </text:span><text:span text:style-name="Default_20_Paragraph_20_Font"><text:span text:style-name="T120">Sonic_Knuckles_wSonic3.bin</text:span></text:span><text:span text:style-name="T119"> to </text:span><text:span text:style-name="Default_20_Paragraph_20_Font"><text:span text:style-name="T120">/switch/sonic3air</text:span></text:span><text:span text:style-name="T119"> on your Switch's SD card. After installing the Steam version, you should be able to find it in one of the directories listed in the section </text:span><text:span text:style-name="Default_20_Paragraph_20_Font"><text:span text:style-name="T121">Sonic 3 &amp; Knuckles Steam ROM</text:span></text:span><text:span text:style-name="T119">.</text:span></text:p>
        </text:list-item>
      </text:list>
      <text:p text:style-name="P120">If you installed Sega Classics to a different location, you'll need to check manually.</text:p>
      <text:p text:style-name="P116"/>
      <text:p text:style-name="P116"><text:span text:style-name="T43">Add</text:span><text:span text:style-name="T3"> the Sonic 3 &amp; Knuckles ROM</text:span></text:p>
      <text:list text:style-name="L19">
        <text:list-item>
          <text:p text:style-name="P121"><text:span text:style-name="Default_20_Paragraph_20_Font"><text:span text:style-name="T122">Use a PC (with Windows or Linux) or a Mac to install the Steam version of Sonic 3 &amp; Knuckles, and get the ROM from there.</text:span></text:span></text:p>
        </text:list-item>
        <text:list-item>
          <text:p text:style-name="P122"><text:span text:style-name="Default_20_Paragraph_20_Font"><text:span text:style-name="T74">Find more information on that in the </text:span></text:span><text:span text:style-name="Default_20_Paragraph_20_Font"><text:span text:style-name="T75">installation </text:span></text:span><text:span text:style-name="Default_20_Paragraph_20_Font"><text:span text:style-name="T74">sections for </text:span></text:span><text:a xlink:type="simple" xlink:href="#2.2.1.Install Sonic 3 A.I.R.|outline" text:style-name="Internet_20_link" text:visited-style-name="Visited_20_Internet_20_Link"><text:span text:style-name="Default_20_Paragraph_20_Font"><text:span text:style-name="T74">Windows</text:span></text:span></text:a><text:span text:style-name="Default_20_Paragraph_20_Font"><text:span text:style-name="T74">, </text:span></text:span><text:a xlink:type="simple" xlink:href="#2.3.1.Install Sonic 3 A.I.R.|outline" text:style-name="Internet_20_link" text:visited-style-name="Visited_20_Internet_20_Link"><text:span text:style-name="Default_20_Paragraph_20_Font"><text:span text:style-name="T74">Mac</text:span></text:span></text:a><text:span text:style-name="Default_20_Paragraph_20_Font"><text:span text:style-name="T74"> </text:span></text:span><text:span text:style-name="Default_20_Paragraph_20_Font"><text:span text:style-name="T75">or</text:span></text:span><text:span text:style-name="Default_20_Paragraph_20_Font"><text:span text:style-name="T74"> </text:span></text:span><text:a xlink:type="simple" xlink:href="#2.4.1.Install Sonic 3 A.I.R.|outline" text:style-name="Internet_20_link" text:visited-style-name="Visited_20_Internet_20_Link"><text:span text:style-name="Default_20_Paragraph_20_Font"><text:span text:style-name="T74">Linux</text:span></text:span></text:a><text:span text:style-name="Default_20_Paragraph_20_Font"><text:span text:style-name="T74">, </text:span></text:span><text:span text:style-name="Default_20_Paragraph_20_Font"><text:span text:style-name="T75">respectively</text:span></text:span><text:span text:style-name="Default_20_Paragraph_20_Font"><text:span text:style-name="T74">.</text:span></text:span></text:p>
        </text:list-item>
      </text:list>
      <text:p text:style-name="P123"><text:span text:style-name="Default_20_Paragraph_20_Font"><text:span text:style-name="T58"/></text:span></text:p>
      <text:h text:style-name="P124" text:outline-level="3"><text:bookmark-start text:name="__RefHeading___Toc2465_623082371"/>Start Sonic 3 A.I.R.<text:bookmark-end text:name="__RefHeading___Toc2465_623082371"/></text:h>
      <text:p text:style-name="Standard">Start Sonic 3 A.I.R. via hbmenu (or whatever method you prefer).</text:p>
      <text:p text:style-name="P125"/>
      <text:p text:style-name="P126"><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116"><text:span text:style-name="Default_20_Paragraph_20_Font"><text:span text:style-name="T58"/></text:span></text:p>
      <text:h text:style-name="P113" text:outline-level="3"><text:bookmark-start text:name="__RefHeading___Toc2467_623082371"/>Got technical issues?<text:bookmark-end text:name="__RefHeading___Toc2467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116"><text:span text:style-name="Default_20_Paragraph_20_Font"><text:span text:style-name="T41"/></text:span></text:p>
      <text:h text:style-name="P113" text:outline-level="3"><text:bookmark-start text:name="__RefHeading___Toc2469_623082371"/><text:span text:style-name="T32">Where‘s your </text:span><text:span text:style-name="T49">s</text:span>aved data<text:bookmark-end text:name="__RefHeading___Toc2469_623082371"/></text:h>
      <text:p text:style-name="P127"><text:span text:style-name="Default_20_Paragraph_20_Font"><text:span text:style-name="T123">The Swit</text:span></text:span><text:span text:style-name="Default_20_Paragraph_20_Font"><text:span text:style-name="T124">c</text:span></text:span><text:span text:style-name="Default_20_Paragraph_20_Font"><text:span text:style-name="T123">h version of Sonic 3 A.I.R. stores its data in the "savedata" folder that is part of the installation.</text:span></text:span></text:p>
      <text:p text:style-name="P127"><text:span text:style-name="Default_20_Paragraph_20_Font"><text:span text:style-name="T123"/></text:span></text:p>
      <text:h text:style-name="P113" text:outline-level="3"><text:bookmark-start text:name="__RefHeading___Toc2471_623082371"/><text:span text:style-name="Default_20_Paragraph_20_Font">Updat</text:span><text:span text:style-name="Default_20_Paragraph_20_Font"><text:span text:style-name="T31">e</text:span></text:span> Sonic 3 A.I.R.<text:bookmark-end text:name="__RefHeading___Toc2471_623082371"/></text:h>
      <text:p text:style-name="P128"><text:span text:style-name="T125">S</text:span>imply extract the new ZIP to the root of your SD card and overwrite all files.</text:p>
      <text:p text:style-name="P129"/>
      <text:p text:style-name="P130"/>
      <text:p text:style-name="P24"/>
      <text:h text:style-name="P12"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text:style-name="L20">
        <text:list-item>
          <text:p text:style-name="P131">Up, Down, Left, Right = Selection change</text:p>
        </text:list-item>
        <text:list-item>
          <text:p text:style-name="P131">Enter = Accept selected option, or start the game</text:p>
        </text:list-item>
      </text:list>
      <text:p text:style-name="Standard"/>
      <text:p text:style-name="Standard">In game:</text:p>
      <text:list text:style-name="L21">
        <text:list-item>
          <text:p text:style-name="P132"><text:span text:style-name="Default_20_Paragraph_20_Font"><text:span text:style-name="T3">Up, Down, Left, Right = Movement</text:span></text:span><text:line-break/>(including crouching, rolling, etc. - you probably know the classic Sonic game controls)</text:p>
        </text:list-item>
        <text:list-item>
          <text:p text:style-name="P132"><text:span text:style-name="Default_20_Paragraph_20_Font"><text:span text:style-name="T3">Q, A, S, D = Jump</text:span></text:span> and usage of character ability (shield power, flying, or gliding)</text:p>
        </text:list-item>
        <text:list-item>
          <text:p text:style-name="P132"><text:span text:style-name="Default_20_Paragraph_20_Font"><text:span text:style-name="T3">W = Super Transformation</text:span></text:span> and Super Cancel</text:p>
        </text:list-item>
        <text:list-item>
          <text:p text:style-name="P132"><text:span text:style-name="Default_20_Paragraph_20_Font"><text:span text:style-name="T3">W = Fast forwarding</text:span></text:span> of certain cutscenes</text:p>
        </text:list-item>
        <text:list-item>
          <text:p text:style-name="P132"><text:span text:style-name="Default_20_Paragraph_20_Font"><text:span text:style-name="T3">W = Restart</text:span></text:span> in Time Attack mode</text:p>
        </text:list-item>
        <text:list-item>
          <text:p text:style-name="P132"><text:span text:style-name="Default_20_Paragraph_20_Font"><text:span text:style-name="T3">Enter = Pause game</text:span></text:span></text:p>
        </text:list-item>
      </text:list>
      <text:p text:style-name="Standard"/>
      <text:p text:style-name="Standard">General:</text:p>
      <text:list text:style-name="L22">
        <text:list-item>
          <text:p text:style-name="P133">F1 = Bring up an overview of hotkeys</text:p>
        </text:list-item>
        <text:list-item>
          <text:p text:style-name="P134">Escape or Alt + Enter = Toggle fullscreen</text:p>
        </text:list-item>
        <text:list-item>
          <text:p text:style-name="P134">Alt + F4 = Quit the game completely</text:p>
        </text:list-item>
        <text:list-item>
          <text:p text:style-name="P134">Numpad Plus and Minus = Change audio volume</text:p>
        </text:list-item>
        <text:list-item>
          <text:p text:style-name="P134">Alt + F and Alt + G = Change the pixel filter</text:p>
        </text:list-item>
        <text:list-item>
          <text:p text:style-name="P135">Alt + H = Change the frame sync method</text:p>
        </text:list-item>
        <text:list-item>
          <text:p text:style-name="P134">Alt + B = Change the background blur effect</text:p>
        </text:list-item>
        <text:list-item>
          <text:p text:style-name="P134">F3 = Rescan for gamepads</text:p>
        </text:list-item>
        <text:list-item>
          <text:p text:style-name="P134">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text:style-name="L20">
        <text:list-item>
          <text:p text:style-name="P131">Up, Down, Left, Right = Selection change</text:p>
        </text:list-item>
        <text:list-item>
          <text:p text:style-name="P131">Start/Menu = Start the game</text:p>
        </text:list-item>
      </text:list>
      <text:p text:style-name="Standard"/>
      <text:p text:style-name="Standard">In game:</text:p>
      <text:list text:style-name="L23">
        <text:list-item>
          <text:p text:style-name="P136">Up, Down, Left, Right = Movement</text:p>
        </text:list-item>
        <text:list-item>
          <text:p text:style-name="P137"><text:span text:style-name="Default_20_Paragraph_20_Font"><text:span text:style-name="T3">A, B, X = Jump</text:span></text:span> and usage of character ability</text:p>
        </text:list-item>
        <text:list-item>
          <text:p text:style-name="P137"><text:span text:style-name="Default_20_Paragraph_20_Font"><text:span text:style-name="T3">Y = Super Transformation</text:span></text:span> and Super Cancel</text:p>
        </text:list-item>
        <text:list-item>
          <text:p text:style-name="P137"><text:span text:style-name="Default_20_Paragraph_20_Font"><text:span text:style-name="T3">Y = Restart</text:span></text:span> in Time Attack mode</text:p>
        </text:list-item>
        <text:list-item>
          <text:p text:style-name="P136">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138"/>
      <text:p text:style-name="Standard">Other gamepads <text:span text:style-name="T126">should</text:span> work as well, even if they are not compatible to the XBox Controller.</text:p>
      <text:p text:style-name="Standard"><text:span text:style-name="T127">The default</text:span> button bindings <text:span text:style-name="T128">may not fit </text:span>in this case<text:span text:style-name="T128">, but you can use the </text:span><text:span text:style-name="T129">Controller Setup menu</text:span><text:span text:style-name="T128"> in the Options under Controls to redefine the bindings to your liking.</text:span></text:p>
      <text:p text:style-name="Standard"/>
      <text:p text:style-name="P139"><text:span text:style-name="T130">Alternative method t</text:span>o manually edit the button bindings:</text:p>
      <text:list text:style-name="L24">
        <text:list-item>
          <text:p text:style-name="P140">Start Sonic 3 A.I.R. once, attach the game controller, and close the game again.</text:p>
        </text:list-item>
        <text:list-item>
          <text:p text:style-name="P140"><text:soft-page-break/>The "settings_input.json" file in the Saved Data now includes an entry somewhere for your controller.</text:p>
        </text:list-item>
        <text:list-item>
          <text:p text:style-name="P140">Feel free to make changes there. Note that the buttons here are enumerated the same way as in Windows' system panel's Gamecontroller details window, but starting with "Button0" representing button 1, etc.</text:p>
        </text:list-item>
      </text:list>
      <text:p text:style-name="P141"/>
      <text:p text:style-name="P141">To change keyboard bindings:</text:p>
      <text:list text:style-name="L25">
        <text:list-item>
          <text:p text:style-name="P142">That works the same way as for game controller button bindings, i.e. there‘s keyboard entries in "settings_input.json".</text:p>
        </text:list-item>
        <text:list-item>
          <text:p text:style-name="P142">Look for "Keyboard1" for keyboard bindings for player 1, and "Keyboard2" for player 2.</text:p>
        </text:list-item>
        <text:list-item>
          <text:p text:style-name="P142">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table-cell table:style-name="Tabelle1.A1" office:value-type="string">
            <text:p text:style-name="P143">"Enter"</text:p>
          </table:table-cell>
          <table:table-cell table:style-name="Tabelle1.B1" office:value-type="string">
            <text:p text:style-name="P143">"0"</text:p>
          </table:table-cell>
          <table:table-cell table:style-name="Tabelle1.B1" office:value-type="string">
            <text:p text:style-name="P143">"A"</text:p>
          </table:table-cell>
          <table:table-cell table:style-name="Tabelle1.D1" office:value-type="string">
            <text:p text:style-name="P143">"Insert"</text:p>
          </table:table-cell>
        </table:table-row>
        <table:table-row>
          <table:table-cell table:style-name="Tabelle1.A2" office:value-type="string">
            <text:p text:style-name="P143">"Backspace"</text:p>
          </table:table-cell>
          <table:table-cell table:style-name="Tabelle1.B2" office:value-type="string">
            <text:p text:style-name="P143">"1"</text:p>
          </table:table-cell>
          <table:table-cell table:style-name="Tabelle1.B2" office:value-type="string">
            <text:p text:style-name="P143">"B"</text:p>
          </table:table-cell>
          <table:table-cell table:style-name="Tabelle1.D2" office:value-type="string">
            <text:p text:style-name="P143">"Home"</text:p>
          </table:table-cell>
        </table:table-row>
        <table:table-row>
          <table:table-cell table:style-name="Tabelle1.A2" office:value-type="string">
            <text:p text:style-name="P143">"Tab"</text:p>
          </table:table-cell>
          <table:table-cell table:style-name="Tabelle1.B2" office:value-type="string">
            <text:p text:style-name="P143">"2"</text:p>
          </table:table-cell>
          <table:table-cell table:style-name="Tabelle1.B2" office:value-type="string">
            <text:p text:style-name="P143">"C"</text:p>
          </table:table-cell>
          <table:table-cell table:style-name="Tabelle1.D2" office:value-type="string">
            <text:p text:style-name="P143">"PageUp"</text:p>
          </table:table-cell>
        </table:table-row>
        <table:table-row>
          <table:table-cell table:style-name="Tabelle1.A2" office:value-type="string">
            <text:p text:style-name="P143">"Space"</text:p>
          </table:table-cell>
          <table:table-cell table:style-name="Tabelle1.B2" office:value-type="string">
            <text:p text:style-name="P143">"3"</text:p>
          </table:table-cell>
          <table:table-cell table:style-name="Tabelle1.B2" office:value-type="string">
            <text:p text:style-name="P143">"D"</text:p>
          </table:table-cell>
          <table:table-cell table:style-name="Tabelle1.D2" office:value-type="string">
            <text:p text:style-name="P143">"Delete"</text:p>
          </table:table-cell>
        </table:table-row>
        <table:table-row>
          <table:table-cell table:style-name="Tabelle1.A2" office:value-type="string">
            <text:p text:style-name="P143">"Exclaim"</text:p>
          </table:table-cell>
          <table:table-cell table:style-name="Tabelle1.B2" office:value-type="string">
            <text:p text:style-name="P143">"4"</text:p>
          </table:table-cell>
          <table:table-cell table:style-name="Tabelle1.B2" office:value-type="string">
            <text:p text:style-name="P143">"E"</text:p>
          </table:table-cell>
          <table:table-cell table:style-name="Tabelle1.D2" office:value-type="string">
            <text:p text:style-name="P143">"End"</text:p>
          </table:table-cell>
        </table:table-row>
        <table:table-row>
          <table:table-cell table:style-name="Tabelle1.A2" office:value-type="string">
            <text:p text:style-name="P143">"QuoteDbl"</text:p>
          </table:table-cell>
          <table:table-cell table:style-name="Tabelle1.B2" office:value-type="string">
            <text:p text:style-name="P143">"5"</text:p>
          </table:table-cell>
          <table:table-cell table:style-name="Tabelle1.B2" office:value-type="string">
            <text:p text:style-name="P143">"F"</text:p>
          </table:table-cell>
          <table:table-cell table:style-name="Tabelle1.D2" office:value-type="string">
            <text:p text:style-name="P143">"PageDown"</text:p>
          </table:table-cell>
        </table:table-row>
        <table:table-row>
          <table:table-cell table:style-name="Tabelle1.A2" office:value-type="string">
            <text:p text:style-name="P143">"Hash"</text:p>
          </table:table-cell>
          <table:table-cell table:style-name="Tabelle1.B2" office:value-type="string">
            <text:p text:style-name="P143">"6"</text:p>
          </table:table-cell>
          <table:table-cell table:style-name="Tabelle1.B2" office:value-type="string">
            <text:p text:style-name="P143">"G"</text:p>
          </table:table-cell>
          <table:table-cell table:style-name="Tabelle1.D2" office:value-type="string">
            <text:p text:style-name="P143">"Up"</text:p>
          </table:table-cell>
        </table:table-row>
        <table:table-row>
          <table:table-cell table:style-name="Tabelle1.A2" office:value-type="string">
            <text:p text:style-name="P143">"Percent"</text:p>
          </table:table-cell>
          <table:table-cell table:style-name="Tabelle1.B2" office:value-type="string">
            <text:p text:style-name="P143">"7"</text:p>
          </table:table-cell>
          <table:table-cell table:style-name="Tabelle1.B2" office:value-type="string">
            <text:p text:style-name="P143">"H"</text:p>
          </table:table-cell>
          <table:table-cell table:style-name="Tabelle1.D2" office:value-type="string">
            <text:p text:style-name="P143">"Down"</text:p>
          </table:table-cell>
        </table:table-row>
        <table:table-row>
          <table:table-cell table:style-name="Tabelle1.A2" office:value-type="string">
            <text:p text:style-name="P143">"Dollar"</text:p>
          </table:table-cell>
          <table:table-cell table:style-name="Tabelle1.B2" office:value-type="string">
            <text:p text:style-name="P143">"8"</text:p>
          </table:table-cell>
          <table:table-cell table:style-name="Tabelle1.B2" office:value-type="string">
            <text:p text:style-name="P143">"I"</text:p>
          </table:table-cell>
          <table:table-cell table:style-name="Tabelle1.D2" office:value-type="string">
            <text:p text:style-name="P143">"Left"</text:p>
          </table:table-cell>
        </table:table-row>
        <table:table-row>
          <table:table-cell table:style-name="Tabelle1.A2" office:value-type="string">
            <text:p text:style-name="P143">"Ampersand"</text:p>
          </table:table-cell>
          <table:table-cell table:style-name="Tabelle1.B2" office:value-type="string">
            <text:p text:style-name="P143">"9"</text:p>
          </table:table-cell>
          <table:table-cell table:style-name="Tabelle1.B2" office:value-type="string">
            <text:p text:style-name="P143">"J"</text:p>
          </table:table-cell>
          <table:table-cell table:style-name="Tabelle1.D2" office:value-type="string">
            <text:p text:style-name="P143">"Right"</text:p>
          </table:table-cell>
        </table:table-row>
        <table:table-row>
          <table:table-cell table:style-name="Tabelle1.A2" office:value-type="string">
            <text:p text:style-name="P143">"Quote"</text:p>
          </table:table-cell>
          <table:table-cell table:style-name="Tabelle1.B2" office:value-type="string">
            <text:p text:style-name="P143">"Colon"</text:p>
          </table:table-cell>
          <table:table-cell table:style-name="Tabelle1.B2" office:value-type="string">
            <text:p text:style-name="P143">"K"</text:p>
          </table:table-cell>
          <table:table-cell table:style-name="Tabelle1.D2" office:value-type="string">
            <text:p text:style-name="P143">"NumpadDivide"</text:p>
          </table:table-cell>
        </table:table-row>
        <table:table-row>
          <table:table-cell table:style-name="Tabelle1.A2" office:value-type="string">
            <text:p text:style-name="P143">"LeftParen"</text:p>
          </table:table-cell>
          <table:table-cell table:style-name="Tabelle1.B2" office:value-type="string">
            <text:p text:style-name="P143">"Semicolon"</text:p>
          </table:table-cell>
          <table:table-cell table:style-name="Tabelle1.B2" office:value-type="string">
            <text:p text:style-name="P143">"L"</text:p>
          </table:table-cell>
          <table:table-cell table:style-name="Tabelle1.D2" office:value-type="string">
            <text:p text:style-name="P143">"NumpadMultiply"</text:p>
          </table:table-cell>
        </table:table-row>
        <table:table-row>
          <table:table-cell table:style-name="Tabelle1.A2" office:value-type="string">
            <text:p text:style-name="P143">"RightParen"</text:p>
          </table:table-cell>
          <table:table-cell table:style-name="Tabelle1.B2" office:value-type="string">
            <text:p text:style-name="P143">"Less"</text:p>
          </table:table-cell>
          <table:table-cell table:style-name="Tabelle1.B2" office:value-type="string">
            <text:p text:style-name="P143">"M"</text:p>
          </table:table-cell>
          <table:table-cell table:style-name="Tabelle1.D2" office:value-type="string">
            <text:p text:style-name="P143">"NumpadMinus"</text:p>
          </table:table-cell>
        </table:table-row>
        <table:table-row>
          <table:table-cell table:style-name="Tabelle1.A2" office:value-type="string">
            <text:p text:style-name="P143">"Asterisk"</text:p>
          </table:table-cell>
          <table:table-cell table:style-name="Tabelle1.B2" office:value-type="string">
            <text:p text:style-name="P143">"Equals"</text:p>
          </table:table-cell>
          <table:table-cell table:style-name="Tabelle1.B2" office:value-type="string">
            <text:p text:style-name="P143">"N"</text:p>
          </table:table-cell>
          <table:table-cell table:style-name="Tabelle1.D2" office:value-type="string">
            <text:p text:style-name="P143">"NumpadPlus"</text:p>
          </table:table-cell>
        </table:table-row>
        <table:table-row>
          <table:table-cell table:style-name="Tabelle1.A2" office:value-type="string">
            <text:p text:style-name="P143">"Plus"</text:p>
          </table:table-cell>
          <table:table-cell table:style-name="Tabelle1.B2" office:value-type="string">
            <text:p text:style-name="P143">"Greater"</text:p>
          </table:table-cell>
          <table:table-cell table:style-name="Tabelle1.B2" office:value-type="string">
            <text:p text:style-name="P143">"O"</text:p>
          </table:table-cell>
          <table:table-cell table:style-name="Tabelle1.D2" office:value-type="string">
            <text:p text:style-name="P143">"NumpadEnter"</text:p>
          </table:table-cell>
        </table:table-row>
        <table:table-row>
          <table:table-cell table:style-name="Tabelle1.A2" office:value-type="string">
            <text:p text:style-name="P143">"Comma"</text:p>
          </table:table-cell>
          <table:table-cell table:style-name="Tabelle1.B2" office:value-type="string">
            <text:p text:style-name="P143">"Question"</text:p>
          </table:table-cell>
          <table:table-cell table:style-name="Tabelle1.B2" office:value-type="string">
            <text:p text:style-name="P143">"P"</text:p>
          </table:table-cell>
          <table:table-cell table:style-name="Tabelle1.D2" office:value-type="string">
            <text:p text:style-name="P143">"Numpad1"</text:p>
          </table:table-cell>
        </table:table-row>
        <table:table-row>
          <table:table-cell table:style-name="Tabelle1.A2" office:value-type="string">
            <text:p text:style-name="P143">"Minus"</text:p>
          </table:table-cell>
          <table:table-cell table:style-name="Tabelle1.B2" office:value-type="string">
            <text:p text:style-name="P143">"At"</text:p>
          </table:table-cell>
          <table:table-cell table:style-name="Tabelle1.B2" office:value-type="string">
            <text:p text:style-name="P143">"Q"</text:p>
          </table:table-cell>
          <table:table-cell table:style-name="Tabelle1.D2" office:value-type="string">
            <text:p text:style-name="P143">"Numpad2"</text:p>
          </table:table-cell>
        </table:table-row>
        <table:table-row>
          <table:table-cell table:style-name="Tabelle1.A2" office:value-type="string">
            <text:p text:style-name="P143">"Perios"</text:p>
          </table:table-cell>
          <table:table-cell table:style-name="Tabelle1.B2" office:value-type="string">
            <text:p text:style-name="P143">"LeftBracket"</text:p>
          </table:table-cell>
          <table:table-cell table:style-name="Tabelle1.B2" office:value-type="string">
            <text:p text:style-name="P143">"R"</text:p>
          </table:table-cell>
          <table:table-cell table:style-name="Tabelle1.D2" office:value-type="string">
            <text:p text:style-name="P143">"Numpad3"</text:p>
          </table:table-cell>
        </table:table-row>
        <table:table-row>
          <table:table-cell table:style-name="Tabelle1.A2" office:value-type="string">
            <text:p text:style-name="P143">"Slash"</text:p>
          </table:table-cell>
          <table:table-cell table:style-name="Tabelle1.B2" office:value-type="string">
            <text:p text:style-name="P143">"Backslash"</text:p>
          </table:table-cell>
          <table:table-cell table:style-name="Tabelle1.B2" office:value-type="string">
            <text:p text:style-name="P143">"S"</text:p>
          </table:table-cell>
          <table:table-cell table:style-name="Tabelle1.D2" office:value-type="string">
            <text:p text:style-name="P143">"Numpad4"</text:p>
          </table:table-cell>
        </table:table-row>
        <table:table-row>
          <table:table-cell table:style-name="Tabelle1.A2" office:value-type="string">
            <text:p text:style-name="P143">"LeftShift"</text:p>
          </table:table-cell>
          <table:table-cell table:style-name="Tabelle1.B2" office:value-type="string">
            <text:p text:style-name="P143">"RightBracket"</text:p>
          </table:table-cell>
          <table:table-cell table:style-name="Tabelle1.B2" office:value-type="string">
            <text:p text:style-name="P143">"T"</text:p>
          </table:table-cell>
          <table:table-cell table:style-name="Tabelle1.D2" office:value-type="string">
            <text:p text:style-name="P143">"Numpad5"</text:p>
          </table:table-cell>
        </table:table-row>
        <table:table-row>
          <table:table-cell table:style-name="Tabelle1.A2" office:value-type="string">
            <text:p text:style-name="P143">"RightShift"</text:p>
          </table:table-cell>
          <table:table-cell table:style-name="Tabelle1.B2" office:value-type="string">
            <text:p text:style-name="P143">"Caret"</text:p>
          </table:table-cell>
          <table:table-cell table:style-name="Tabelle1.B2" office:value-type="string">
            <text:p text:style-name="P143">"U"</text:p>
          </table:table-cell>
          <table:table-cell table:style-name="Tabelle1.D2" office:value-type="string">
            <text:p text:style-name="P143">"Numpad6"</text:p>
          </table:table-cell>
        </table:table-row>
        <table:table-row>
          <table:table-cell table:style-name="Tabelle1.A2" office:value-type="string">
            <text:p text:style-name="P143">"LeftCtrl"</text:p>
          </table:table-cell>
          <table:table-cell table:style-name="Tabelle1.B2" office:value-type="string">
            <text:p text:style-name="P143">"Underscore"</text:p>
          </table:table-cell>
          <table:table-cell table:style-name="Tabelle1.B2" office:value-type="string">
            <text:p text:style-name="P143">"V"</text:p>
          </table:table-cell>
          <table:table-cell table:style-name="Tabelle1.D2" office:value-type="string">
            <text:p text:style-name="P143">"Numpad7"</text:p>
          </table:table-cell>
        </table:table-row>
        <table:table-row>
          <table:table-cell table:style-name="Tabelle1.A2" office:value-type="string">
            <text:p text:style-name="P143">"RightCtrl"</text:p>
          </table:table-cell>
          <table:table-cell table:style-name="Tabelle1.B2" office:value-type="string">
            <text:p text:style-name="P143">"BackQuote"</text:p>
          </table:table-cell>
          <table:table-cell table:style-name="Tabelle1.B2" office:value-type="string">
            <text:p text:style-name="P143">"W"</text:p>
          </table:table-cell>
          <table:table-cell table:style-name="Tabelle1.D2" office:value-type="string">
            <text:p text:style-name="P143">"Numpad8"</text:p>
          </table:table-cell>
        </table:table-row>
        <table:table-row>
          <table:table-cell table:style-name="Tabelle1.A2" office:value-type="string">
            <text:p text:style-name="P143">"LeftAlt"</text:p>
          </table:table-cell>
          <table:table-cell table:style-name="Tabelle1.B2" office:value-type="string">
            <text:p text:style-name="P143"/>
          </table:table-cell>
          <table:table-cell table:style-name="Tabelle1.B2" office:value-type="string">
            <text:p text:style-name="P143">"X"</text:p>
          </table:table-cell>
          <table:table-cell table:style-name="Tabelle1.D2" office:value-type="string">
            <text:p text:style-name="P143">"Numpad9"</text:p>
          </table:table-cell>
        </table:table-row>
        <table:table-row>
          <table:table-cell table:style-name="Tabelle1.A2" office:value-type="string">
            <text:p text:style-name="P143">"RightAlt"</text:p>
          </table:table-cell>
          <table:table-cell table:style-name="Tabelle1.B2" office:value-type="string">
            <text:p text:style-name="P143"/>
          </table:table-cell>
          <table:table-cell table:style-name="Tabelle1.B2" office:value-type="string">
            <text:p text:style-name="P143">"Y"</text:p>
          </table:table-cell>
          <table:table-cell table:style-name="Tabelle1.D2" office:value-type="string">
            <text:p text:style-name="P143">"Numpad0"</text:p>
          </table:table-cell>
        </table:table-row>
        <table:table-row>
          <table:table-cell table:style-name="Tabelle1.A2" office:value-type="string">
            <text:p text:style-name="P143">"CapsLock"</text:p>
          </table:table-cell>
          <table:table-cell table:style-name="Tabelle1.B2" office:value-type="string">
            <text:p text:style-name="P143"/>
          </table:table-cell>
          <table:table-cell table:style-name="Tabelle1.B2" office:value-type="string">
            <text:p text:style-name="P143">"Z"</text:p>
          </table:table-cell>
          <table:table-cell table:style-name="Tabelle1.D2" office:value-type="string">
            <text:p text:style-name="P143">"NumpadPeriod"</text:p>
          </table:table-cell>
        </table:table-row>
      </table:table>
      <text:p text:style-name="Standard"/>
      <text:p text:style-name="Standard"/>
      <text:h text:style-name="P12" text:outline-level="1"><text:bookmark-start text:name="__RefHeading___Toc1660_1429397617"/>Special Character Moves<text:bookmark-end text:name="__RefHeading___Toc1660_1429397617"/></text:h>
      <text:p text:style-name="P138"/>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text:style-name="L26">
        <text:list-item>
          <text:p text:style-name="P144">You need to play with Tails as an AI-controlled second character.</text:p>
        </text:list-item>
        <text:list-item>
          <text:p text:style-name="P144">Jump and when both you and Tails are in mid-air, press <text:span text:style-name="Default_20_Paragraph_20_Font"><text:span text:style-name="T3">Up + Jump</text:span></text:span> to make Tails fly. You can then hang on to him and let him carry you around.</text:p>
        </text:list-item>
        <text:list-item>
          <text:p text:style-name="P144">While being carried, control the flight with the <text:span text:style-name="Default_20_Paragraph_20_Font"><text:span text:style-name="T3">Up, Down, Left, Right</text:span></text:span> buttons.</text:p>
        </text:list-item>
        <text:list-item>
          <text:p text:style-name="P144">When pressing no button at all, Tails will try to hover in place until he gets tired.</text:p>
        </text:list-item>
        <text:list-item>
          <text:p text:style-name="P144">Tails Assist styles:</text:p>
          <text:list>
            <text:list-item>
              <text:p text:style-name="P144">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44">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text:style-name="L27">
        <text:list-item>
          <text:p text:style-name="P145">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text:style-name="L28">
        <text:list-item>
          <text:p text:style-name="P146">When playing as Tails, you can cancel his flight at any time by pressing <text:span text:style-name="Default_20_Paragraph_20_Font"><text:span text:style-name="T3">Down + Jump.</text:span></text:span></text:p>
        </text:list-item>
        <text:list-item>
          <text:p text:style-name="P146">This will curl Tails into a ball again. Use this move to attack enemies from above!</text:p>
        </text:list-item>
      </text:list>
      <text:p text:style-name="Standard"/>
      <text:p text:style-name="Standard"/>
      <text:p text:style-name="Standard"/>
      <text:h text:style-name="Heading_20_1" text:outline-level="1"/>
      <text:h text:style-name="P12" text:outline-level="1"><text:bookmark-start text:name="__RefHeading___Toc1117_7661665"/>Game Options<text:bookmark-end text:name="__RefHeading___Toc1117_7661665"/></text:h>
      <text:p text:style-name="P21"/>
      <text:p text:style-name="Standard">In the game‘s Options menu, you can find various settings to customize the game to your liking.</text:p>
      <text:p text:style-name="Standard"/>
      <text:h text:style-name="P147" text:outline-level="2"><text:bookmark-start text:name="__RefHeading___Toc1119_766166511"/>Mod Options<text:bookmark-end text:name="__RefHeading___Toc1119_766166511"/></text:h>
      <text:p text:style-name="P148"/>
      <text:p text:style-name="P149">If you have mods installed and activated that feature their own options, you can find them all in the Mods tab. It's left to the System tab, and only appears if there's actual options for at least one active mod.</text:p>
      <text:p text:style-name="P149"/>
      <text:h text:style-name="P147" text:outline-level="2"><text:bookmark-start text:name="__RefHeading___Toc1119_76616651"/>System<text:bookmark-end text:name="__RefHeading___Toc1119_76616651"/></text:h>
      <text:p text:style-name="P148"/>
      <text:p text:style-name="P149">The System tab for the most part is not about options, but more of a start page with various information, links, etc.</text:p>
      <text:p text:style-name="P149"/>
      <text:p text:style-name="P149">You can use the <text:span text:style-name="T3">Update Check</text:span> to search for new game updates. Choose whether your search should include only the well-tested stable updates, the more experimental previews as well, or maybe even the bleeding-edge test builds.</text:p>
      <text:p text:style-name="P149"/>
      <text:p text:style-name="P150"><text:span text:style-name="T131">Ghost Sync</text:span> <text:span text:style-name="T132">enables the experimental online mode</text:span>.<text:span text:style-name="T132"> With Ghost Sync enabled, you can see other players online at the same time as ghosts.</text:span></text:p>
      <text:p text:style-name="P150"/>
      <text:p text:style-name="P151"><text:span text:style-name="T3">Open File Browser</text:span> shows a file management menu for the game's internal save data. It can be particularly useful for installing mods on Android and the iOS/Web version.</text:p>
      <text:p text:style-name="P150"/>
      <text:p text:style-name="P150"><text:span text:style-name="T3">More Info</text:span> contains links th<text:span text:style-name="T133">a</text:span>t will be opened in your web browser - namely to the game homepage, and to the online version of the game manual that you're reading right now.</text:p>
      <text:p text:style-name="P149"/>
      <text:p text:style-name="P149">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152"><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text:style-name="L29">
        <text:list-item>
          <text:p text:style-name="P153"><text:span text:style-name="Default_20_Paragraph_20_Font"><text:span text:style-name="T3">Renderer:</text:span></text:span> The <text:span text:style-name="T134">OpenGL </text:span>Hardware Renderer is the recommended option, as it‘s usually faster and allows for higher quality of certain effects like background blur. However, if you encounter large graphics errors in the game, try the <text:span text:style-name="T134">OpenGL </text:span>Software Renderer instead.<text:span text:style-name="T134"> And if OpenGL doesn't work for you at all, there's still the Fail-safe / Software Renderer.</text:span></text:p>
        </text:list-item>
        <text:list-item>
          <text:p text:style-name="P154"><text:span text:style-name="T135">Frame Sync:</text:span><text:span text:style-name="T136"> Enable or disable vertical synchronization with your screen (V-Sync). This is usually recommended to have enabled, especially if you‘re using a monitor with 60 Hz refresh rate. </text:span><text:span text:style-name="T137">In case your monitor has a higher refresh rate than 60 Hz, try the V-Sync + FPS Cap option. I</text:span><text:span text:style-name="T136">f you encounter input lag or an unsmooth </text:span><text:span text:style-name="T138">frame rate, </text:span><text:span text:style-name="T139">maybe turning</text:span><text:span text:style-name="T138"> V-Sync </text:span><text:span text:style-name="T139">off is a good choice</text:span><text:span text:style-name="T136">.<text:line-break/></text:span><text:span text:style-name="T140">You can </text:span><text:span text:style-name="T141">change</text:span><text:span text:style-name="T140"> </text:span><text:span text:style-name="T141">this</text:span><text:span text:style-name="T140"> setting at any time by press</text:span><text:span text:style-name="T142">ing Alt+H.</text:span></text:p>
        </text:list-item>
        <text:list-item>
          <text:p text:style-name="P155"><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56"><text:soft-page-break/><text:span text:style-name="Default_20_Paragraph_20_Font"><text:span text:style-name="T143">Backdrop:</text:span></text:span><text:span text:style-name="Default_20_Paragraph_20_Font"><text:span text:style-name="T144"> If you have a screen wider (or higher) than 16:9, you can enable a background image for the outer screen region here.</text:span></text:span></text:p>
        </text:list-item>
        <text:list-item>
          <text:p text:style-name="P157"><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140">You can </text:span><text:span text:style-name="T141">change</text:span><text:span text:style-name="T140"> </text:span><text:span text:style-name="T141">this</text:span><text:span text:style-name="T140"> setting at any time by pressin</text:span><text:span text:style-name="T142">g Alt+</text:span><text:span text:style-name="T145">F or Alt+</text:span><text:span text:style-name="T146">G</text:span><text:span text:style-name="T142">.</text:span></text:p>
        </text:list-item>
        <text:list-item>
          <text:p text:style-name="P155"><text:span text:style-name="Default_20_Paragraph_20_Font"><text:span text:style-name="T3">Scanlines:</text:span></text:span> Adds <text:span text:style-name="T147">horizontal</text:span> black stripes to resemble a good old CRT TV.</text:p>
        </text:list-item>
        <text:list-item>
          <text:p text:style-name="P157"><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140">You can </text:span><text:span text:style-name="T141">change</text:span><text:span text:style-name="T140"> </text:span><text:span text:style-name="T141">this</text:span><text:span text:style-name="T140"> setting at any time by pressing Alt+</text:span><text:span text:style-name="T148">B</text:span><text:span text:style-name="T140">.</text:span></text:p>
        </text:list-item>
      </text:list>
      <text:p text:style-name="Standard"/>
      <text:p text:style-name="Standard">Window Mode</text:p>
      <text:list text:style-name="L30">
        <text:list-item>
          <text:p text:style-name="P158"><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58"><text:span text:style-name="Default_20_Paragraph_20_Font"><text:span text:style-name="T3">Startup Screen:</text:span></text:span> Same as above, but here you can set which window mode the game will start in.</text:p>
        </text:list-item>
      </text:list>
      <text:p text:style-name="Standard"/>
      <text:p text:style-name="P159"><text:span text:style-name="T136">Performance </text:span><text:span text:style-name="T138">Output</text:span></text:p>
      <text:list text:style-name="L31">
        <text:list-item>
          <text:p text:style-name="P160"><text:span text:style-name="T135">Show Performance:</text:span><text:span text:style-name="T136"> Display performance measurements on the screen, either the frames per second (FPS) or a more detailled p</text:span><text:span text:style-name="T138">rofiling - this is mainly meant for diagnosing performance issues.<text:line-break/></text:span><text:span text:style-name="T148">You can </text:span><text:span text:style-name="T141">change</text:span><text:span text:style-name="T148"> </text:span><text:span text:style-name="T141">this</text:span><text:span text:style-name="T148"> setting at any time by pressing Alt + </text:span><text:span text:style-name="T149">P</text:span><text:span text:style-name="T148">.</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text:style-name="L32">
        <text:list-item>
          <text:p text:style-name="P161"><text:span text:style-name="Default_20_Paragraph_20_Font"><text:span text:style-name="T3">Overall Volume:</text:span></text:span> Base volume for all audio output.</text:p>
        </text:list-item>
        <text:list-item>
          <text:p text:style-name="P161"><text:span text:style-name="Default_20_Paragraph_20_Font"><text:span text:style-name="T3">Music Volume:</text:span></text:span> Relative volume for music playback.</text:p>
        </text:list-item>
        <text:list-item>
          <text:p text:style-name="P161"><text:span text:style-name="Default_20_Paragraph_20_Font"><text:span text:style-name="T3">Sound Volume:</text:span></text:span> Relative volume for all sound effects.</text:p>
        </text:list-item>
      </text:list>
      <text:p text:style-name="Standard"/>
      <text:p text:style-name="Standard">Soundtrack</text:p>
      <text:list text:style-name="L33">
        <text:list-item>
          <text:p text:style-name="P162"><text:span text:style-name="Default_20_Paragraph_20_Font"><text:span text:style-name="T3">Soundtrack Type:</text:span></text:span> The remastered soundtrack uses higher quality samples, but is still very close to the original (here emulated) music.</text:p>
        </text:list-item>
        <text:list-item>
          <text:p text:style-name="P162"><text:span text:style-name="Default_20_Paragraph_20_Font"><text:span text:style-name="T3">Sound Test:</text:span></text:span> Check out the game‘s music!</text:p>
        </text:list-item>
      </text:list>
      <text:p text:style-name="Standard"/>
      <text:p text:style-name="Standard"><text:span text:style-name="T150">Theme</text:span> <text:span text:style-name="T151">/ </text:span><text:span text:style-name="T152">Level / </text:span><text:span text:style-name="T151">Music </text:span>Selection</text:p>
      <text:list text:style-name="L34">
        <text:list-item>
          <text:p text:style-name="P163">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164">Music Behavior</text:p>
      <text:list text:style-name="L35">
        <text:list-item>
          <text:p text:style-name="P165"><text:span text:style-name="Default_20_Paragraph_20_Font"><text:span text:style-name="T153">On Level (Re)Start</text:span></text:span><text:span text:style-name="Default_20_Paragraph_20_Font"><text:span text:style-name="T3">:</text:span></text:span> <text:span text:style-name="T154">Choose whether to continue the music when restarting a level, or restart it</text:span>.</text:p>
        </text:list-item>
      </text:list>
      <text:p text:style-name="P164"/>
      <text:p text:style-name="Standard">Effects</text:p>
      <text:list text:continue-numbering="true" text:style-name="L35">
        <text:list-item>
          <text:p text:style-name="P166"><text:span text:style-name="Default_20_Paragraph_20_Font"><text:span text:style-name="T3">Underwater Sounds:</text:span></text:span> Enable a muffled playback of music and sounds while under water, or stay with normal playback with no changes.</text:p>
        </text:list-item>
      </text:list>
      <text:p text:style-name="Standard"/>
      <text:p text:style-name="Standard"/>
      <text:p text:style-name="Standard"/>
      <text:p text:style-name="Standard"/>
      <text:h text:style-name="Heading_20_2" text:outline-level="2"><text:bookmark-start text:name="__RefHeading___Toc1123_7661665"/><text:soft-page-break/>Visuals<text:bookmark-end text:name="__RefHeading___Toc1123_7661665"/></text:h>
      <text:p text:style-name="Standard"/>
      <text:p text:style-name="Standard">Visual Enhancements</text:p>
      <text:list text:style-name="L36">
        <text:list-item>
          <text:p text:style-name="P167"><text:span text:style-name="Default_20_Paragraph_20_Font"><text:span text:style-name="T3">Character Rotation:</text:span></text:span> Use a smooth 360° rotation for characters (and few other objects), or stick to the original 8-way rotation.</text:p>
        </text:list-item>
        <text:list-item>
          <text:p text:style-name="P167"><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68"><text:span text:style-name="Default_20_Paragraph_20_Font"><text:span text:style-name="T155">Lives</text:span></text:span><text:span text:style-name="Default_20_Paragraph_20_Font"><text:span text:style-name="T3"> Display:</text:span></text:span> <text:span text:style-name="T156">You can show the lives</text:span><text:span text:style-name="T157"> counter</text:span><text:span text:style-name="T156"> either in the lower left corner as in classic Sonic games, or in the upper right corner as in the mobile remasters of Sonic 1/2/CD</text:span>.</text:p>
        </text:list-item>
        <text:list-item>
          <text:p text:style-name="P168"><text:span text:style-name="Default_20_Paragraph_20_Font"><text:span text:style-name="T3">Speed Shoes Effect:</text:span></text:span> Enable or disable the ghost effect when speed shoes are active.</text:p>
        </text:list-item>
        <text:list-item>
          <text:p text:style-name="P167"><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67"><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text:style-name="L37">
        <text:list-item>
          <text:p text:style-name="P169"><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158">[Always disabled in Time Attack]</text:span></text:span></text:p>
        </text:list-item>
        <text:list-item>
          <text:p text:style-name="P169"><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text:style-name="L38">
        <text:list-item>
          <text:p text:style-name="P170"><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158">[Always S3&amp;K monitors in Time Attack]</text:span></text:span></text:p>
        </text:list-item>
      </text:list>
      <text:p text:style-name="Standard"/>
      <text:p text:style-name="Standard">Color Changes</text:p>
      <text:list text:continue-numbering="true" text:style-name="L38">
        <text:list-item>
          <text:p text:style-name="P170"><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Special Stages</text:p>
      <text:list text:style-name="L39">
        <text:list-item>
          <text:p text:style-name="P171"><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1"><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text:style-name="L40">
        <text:list-item>
          <text:p text:style-name="P172"><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158">[Time Attack always uses A.I.R. layouts]</text:span></text:span></text:p>
        </text:list-item>
      </text:list>
      <text:p text:style-name="Standard"/>
      <text:p text:style-name="Standard">Difficulty Changes</text:p>
      <text:list text:style-name="L41">
        <text:list-item>
          <text:p text:style-name="P173"><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3"><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3"><text:span text:style-name="Default_20_Paragraph_20_Font"><text:span text:style-name="T3">Sandopolis Ghosts:</text:span></text:span> If those ghosts realy annoy you, switch them off to make Sandopolis Zone Act 2 easier.</text:p>
        </text:list-item>
        <text:list-item>
          <text:p text:style-name="P174"><text:soft-page-break/><text:span text:style-name="T3">Lava Reef </text:span><text:span text:style-name="T159">Act </text:span><text:span text:style-name="T3">2 Boss:</text:span> Use the recommended setting of 8 hit points for the boss, or the original 14 hit points.</text:p>
        </text:list-item>
        <text:list-item>
          <text:p text:style-name="P175"><text:span text:style-name="T3">Keep Shield aftzer Zone:</text:span> If enabled, you carry over your shield into the next zone.</text:p>
        </text:list-item>
      </text:list>
      <text:p text:style-name="Standard"/>
      <text:p text:style-name="Standard">Time Attack</text:p>
      <text:list text:style-name="L42">
        <text:list-item>
          <text:p text:style-name="P176"><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177"><text:span text:style-name="T3">Quick Restart:</text:span> Make the Y button (W on keyboard) either instantly restart Time Attack, or require holding it for a brief period of time, to avoid unintentional restarts.</text:p>
        </text:list-item>
      </text:list>
      <text:p text:style-name="P178"/>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text:style-name="L43">
        <text:list-item>
          <text:p text:style-name="P179">First complete some achievements, then you will get the respective options here. Note that after unlocking, these are <text:span text:style-name="T53">still disabled by default</text:span>, so you have to enable them here.<text:line-break/><text:span text:style-name="Default_20_Paragraph_20_Font"><text:span text:style-name="T158">[These are always disabled in Time Attack, except for that secret unlockable category]</text:span></text:span></text:p>
        </text:list-item>
      </text:list>
      <text:p text:style-name="Standard"/>
      <text:p text:style-name="P180">Controllers</text:p>
      <text:list text:style-name="L44">
        <text:list-item>
          <text:p text:style-name="P181"><text:span text:style-name="T3">Setup Keyboard &amp; Game Controllers:</text:span><text:span text:style-name="T33"> Opens a menu where you can reassign keyboard and controller bindings for game controls.</text:span><text:span text:style-name="T160"> In this menu, you can also choose between different sets of icons used for game</text:span><text:span text:style-name="T161"> controller</text:span><text:span text:style-name="T160"> buttons.</text:span></text:p>
        </text:list-item>
        <text:list-item>
          <text:p text:style-name="P182"><text:span text:style-name="T3">Controller Player 1:</text:span> If you have a gamepad or other controller connected, select it here for the main player.</text:p>
        </text:list-item>
        <text:list-item>
          <text:p text:style-name="P182"><text:span text:style-name="T3">Controller Player 2:</text:span><text:span text:style-name="T33"> And this is the controller for player 2, in case you want to play together with a friend.</text:span></text:p>
        </text:list-item>
        <text:list-item>
          <text:p text:style-name="P183"><text:span text:style-name="T162">Other </text:span><text:span text:style-name="T163">C</text:span><text:span text:style-name="T162">ontrollers:</text:span><text:span text:style-name="T164"> Choose what to do with connected controllers that are </text:span><text:span text:style-name="T165">not manually assigned to player 1 or 2 with the options above. You can e.g. automatically assign any connected controller to player 1 (that‘s the default).</text:span></text:p>
        </text:list-item>
      </text:list>
      <text:p text:style-name="Standard"/>
      <text:p text:style-name="P184">Virtual Gamepad <text:span text:style-name="T55">(only on Android and iOS)</text:span></text:p>
      <text:list text:style-name="L45">
        <text:list-item>
          <text:p text:style-name="P185"><text:span text:style-name="T166">Configure Touch Gamepad:</text:span><text:span text:style-name="T167"> Enter this option </text:span><text:span text:style-name="T168">using</text:span><text:span text:style-name="T167"> the on-screen touch controls to bring up a screen where you can move around the touch controls to where you like them most.</text:span></text:p>
        </text:list-item>
        <text:list-item>
          <text:p text:style-name="P185"><text:span text:style-name="T166">D-Pad Size:</text:span><text:span text:style-name="T167"> Change the size of the touch controls </text:span><text:span text:style-name="T168">D</text:span><text:span text:style-name="T167">-</text:span><text:span text:style-name="T168">P</text:span><text:span text:style-name="T167">ad here.</text:span></text:p>
        </text:list-item>
        <text:list-item>
          <text:p text:style-name="P185"><text:span text:style-name="T169">Buttons</text:span><text:span text:style-name="T166"> Size:</text:span><text:span text:style-name="T167"> Change the size of the </text:span><text:span text:style-name="T168">four buttons</text:span><text:span text:style-name="T167"> </text:span><text:span text:style-name="T168">in the touch controls</text:span><text:span text:style-name="T167">.</text:span></text:p>
        </text:list-item>
        <text:list-item>
          <text:p text:style-name="P186"><text:span text:style-name="T3">Visibility:</text:span> Use this option to change the transparency of the touch controls.</text:p>
        </text:list-item>
      </text:list>
      <text:p text:style-name="Standard"/>
      <text:p text:style-name="P187">Controller Rumble</text:p>
      <text:list text:style-name="L46">
        <text:list-item>
          <text:p text:style-name="P188"><text:span text:style-name="Default_20_Paragraph_20_Font"><text:span text:style-name="T170">Rumble Player 1</text:span></text:span><text:span text:style-name="Default_20_Paragraph_20_Font"><text:span text:style-name="T3">:</text:span></text:span> <text:span text:style-name="T171">Enable controller rumble effect for player 1, and change its intensity here</text:span>.<text:span text:style-name="T171"> Note that the rumble feature only works with certain types of gamepads.</text:span></text:p>
        </text:list-item>
        <text:list-item>
          <text:p text:style-name="P188"><text:span text:style-name="Default_20_Paragraph_20_Font"><text:span text:style-name="T170">Rumble Player 2</text:span></text:span><text:span text:style-name="Default_20_Paragraph_20_Font"><text:span text:style-name="T3">:</text:span></text:span> <text:span text:style-name="T171">The same for player 2.</text:span><text:line-break/></text:p>
        </text:list-item>
      </text:list>
      <text:p text:style-name="Standard">Abilities</text:p>
      <text:list text:continue-numbering="true" text:style-name="L46">
        <text:list-item>
          <text:p text:style-name="P189"><text:span text:style-name="Default_20_Paragraph_20_Font"><text:span text:style-name="T3">Sonic Insta-Shield:</text:span></text:span> Optionally disable Sonic‘s Insta-Shield attack.<text:line-break/><text:span text:style-name="Default_20_Paragraph_20_Font"><text:span text:style-name="T158">[Always enabled in Time Attack]</text:span></text:span></text:p>
        </text:list-item>
        <text:list-item>
          <text:p text:style-name="P189"><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9"><text:span text:style-name="Default_20_Paragraph_20_Font"><text:span text:style-name="T3">Tails Flight Cancel:</text:span></text:span> Press Down + Jump to roll into a ball again while flying around.<text:line-break/><text:span text:style-name="Default_20_Paragraph_20_Font"><text:span text:style-name="T158">[Always enabled in Time Attack]</text:span></text:span></text:p>
        </text:list-item>
        <text:list-item>
          <text:p text:style-name="P190"><text:span text:style-name="Default_20_Paragraph_20_Font"><text:span text:style-name="T172">Roll Jump Control Lock</text:span></text:span><text:span text:style-name="Default_20_Paragraph_20_Font"><text:span text:style-name="T3">:</text:span></text:span><text:span text:style-name="Default_20_Paragraph_20_Font"><text:span text:style-name="T33"> </text:span></text:span><text:span text:style-name="Default_20_Paragraph_20_Font"><text:span text:style-name="T173">Allows you to control your movement after jumping out of rolling on the ground. Enable it for more control, like in Sonic Mania, or disable it for the original game behavior</text:span></text:span><text:span text:style-name="Default_20_Paragraph_20_Font"><text:span text:style-name="T174">.<text:line-break/></text:span></text:span><text:span text:style-name="Default_20_Paragraph_20_Font"><text:span text:style-name="T175">[Always </text:span></text:span><text:span text:style-name="Default_20_Paragraph_20_Font"><text:span text:style-name="T176">enabled</text:span></text:span><text:span text:style-name="Default_20_Paragraph_20_Font"><text:span text:style-name="T175"> in Time Attack]</text:span></text:span></text:p>
        </text:list-item>
        <text:list-item>
          <text:p text:style-name="P189"><text:soft-page-break/><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55"><text:line-break/></text:span></text:span><text:span text:style-name="Default_20_Paragraph_20_Font"><text:span text:style-name="T158">[Always Sonic 3 style in Time Attack]</text:span></text:span></text:p>
        </text:list-item>
      </text:list>
      <text:p text:style-name="Standard"/>
      <text:p text:style-name="Standard">Super &amp; Hyper Forms</text:p>
      <text:list text:continue-numbering="true" text:style-name="L46">
        <text:list-item>
          <text:p text:style-name="P189"><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9"><text:span text:style-name="Default_20_Paragraph_20_Font"><text:span text:style-name="T3">Super Cancel:</text:span></text:span> Allows for the W key / Y button to cancel a Super or Hyper form again and go back to normal.</text:p>
        </text:list-item>
        <text:list-item>
          <text:p text:style-name="P191"><text:span text:style-name="T177">Super </text:span><text:span text:style-name="T3">Sonic </text:span><text:span text:style-name="T177">Jump Ability</text:span><text:span text:style-name="T3">:</text:span> <text:span text:style-name="T178">Optionally enable a Super Dash as a somewhat weaker version of the Hyper Dash</text:span>.<text:span text:style-name="T178"> Or a directional dash depending on which shield you currently have.</text:span></text:p>
        </text:list-item>
        <text:list-item>
          <text:p text:style-name="P192"><text:span text:style-name="T3">Sonic Hyper Dash:</text:span> With Hyper Sonic, perform the Hyper Dash ability in mid-air either only when also pressing Up / Down / Left / Right, or no matter whether a direction key is pressed.</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text:style-name="L43">
        <text:list-item>
          <text:p text:style-name="P179">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text:style-name="L41">
        <text:list-item>
          <text:p text:style-name="P173"><text:span text:style-name="Default_20_Paragraph_20_Font"><text:span text:style-name="T3">Infinite Lives:</text:span></text:span> In case you are new to Sonic 3 or Sonic games in general, try enabling so you don‘t have to care about lives any more.</text:p>
        </text:list-item>
        <text:list-item>
          <text:p text:style-name="P173"><text:span text:style-name="Default_20_Paragraph_20_Font"><text:span text:style-name="T3">Infinite Time:</text:span></text:span> No need to hurry, this game is not about speed. Or is it?</text:p>
        </text:list-item>
      </text:list>
      <text:p text:style-name="Standard"/>
      <text:p text:style-name="Standard">Game Variety</text:p>
      <text:list text:style-name="L47">
        <text:list-item>
          <text:p text:style-name="P193"><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3"><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158">[Time Attack always uses normal monitors]</text:span></text:span></text:p>
        </text:list-item>
        <text:list-item>
          <text:p text:style-name="P194"><text:span text:style-name="Default_20_Paragraph_20_Font"><text:span text:style-name="T3">Monitor</text:span></text:span><text:span text:style-name="Default_20_Paragraph_20_Font"><text:span text:style-name="T179"> Behavior</text:span></text:span><text:span text:style-name="Default_20_Paragraph_20_Font"><text:span text:style-name="T3">:</text:span></text:span> <text:span text:style-name="T180">Do you prefer the monitor to bounce and fall down if hit from below, like in Sonic 1 and 2? There's an option for that!</text:span></text:p>
        </text:list-item>
      </text:list>
      <text:p text:style-name="Standard"/>
      <text:p text:style-name="Standard">Special Stages</text:p>
      <text:list text:continue-numbering="true" text:style-name="L47">
        <text:list-item>
          <text:p text:style-name="P193"><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55">hard</text:span></text:span>.</text:p>
        </text:list-item>
        <text:list-item>
          <text:p text:style-name="P193"><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text:style-name="L48">
        <text:list-item>
          <text:p text:style-name="P195"><text:span text:style-name="Default_20_Paragraph_20_Font"><text:span text:style-name="T3">Region Code:</text:span></text:span> Switch between the Western and Japanese versions of the game. Most notable difference is the in-game name of Miles "Tails" Prower.</text:p>
        </text:list-item>
      </text:list>
      <text:p text:style-name="P196"/>
      <text:p text:style-name="P197">Speedrunning</text:p>
      <text:list text:continue-numbering="true" text:style-name="L48">
        <text:list-item>
          <text:p text:style-name="P198"><text:span text:style-name="Default_20_Paragraph_20_Font"><text:span text:style-name="T181">Glitch Fixes</text:span></text:span><text:span text:style-name="Default_20_Paragraph_20_Font"><text:span text:style-name="T3">:</text:span></text:span><text:span text:style-name="Default_20_Paragraph_20_Font"><text:span text:style-name="T182"> By default, </text:span></text:span><text:span text:style-name="T183">Sonic 3 A.I.R. introduces fixes for certain glitches, some of which can be quite useful for speedrunning</text:span>.<text:span text:style-name="T183"> You can choose how many of these fixes you want to enable for your game.</text:span></text:p>
        </text:list-item>
      </text:list>
      <text:p text:style-name="P199"><text:soft-page-break/><text:span text:style-name="T184">Other Enhancements</text:span></text:p>
      <text:list text:style-name="L49">
        <text:list-item>
          <text:p text:style-name="P200">These are additional smaller quality of life changes that Sonic 3 A.I.R. automatically applies. It's recommended to leave them on, but if you want to get back the original game behavior, you can toggle that here.</text:p>
        </text:list-item>
      </text:list>
      <text:p text:style-name="P201"/>
      <text:h text:style-name="P12"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99CF58F9.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53">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55">Note that the Software Renderer lacks a few features and should </text:span></text:span><text:span text:style-name="Default_20_Paragraph_20_Font"><text:span text:style-name="T185">only</text:span></text:span><text:span text:style-name="Default_20_Paragraph_20_Font"><text:span text:style-name="T55"> be used if the default Hardware Renderer does not work correctly.</text:span></text:span></text:p>
      <text:p text:style-name="P141"/>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text:style-name="L50">
        <text:list-item>
          <text:p text:style-name="P202">Open Windows Explorer and copy this into the address line:<text:line-break/><text:span text:style-name="Default_20_Paragraph_20_Font"><text:span text:style-name="T58">%appdata%\Sonic3AIR</text:span></text:span></text:p>
        </text:list-item>
        <text:list-item>
          <text:p text:style-name="P202">After pressing Enter, this takes you to the folder where the game stores settings and other data</text:p>
        </text:list-item>
        <text:list-item>
          <text:p text:style-name="P202">Open the file "settings.json" or just "settings" with a text editor (use Notepad if there's nothing better installed)</text:p>
        </text:list-item>
        <text:list-item>
          <text:p text:style-name="P202">Search for the following part:<text:line-break/><text:span text:style-name="Default_20_Paragraph_20_Font"><text:span text:style-name="T58">"FailSafeMode" : false,</text:span></text:span></text:p>
        </text:list-item>
        <text:list-item>
          <text:p text:style-name="P202">Change the word <text:span text:style-name="Default_20_Paragraph_20_Font"><text:span text:style-name="T58">false</text:span></text:span> to <text:span text:style-name="Default_20_Paragraph_20_Font"><text:span text:style-name="T58">true</text:span></text:span>, then save the file and start the game</text:p>
        </text:list-item>
      </text:list>
      <text:p text:style-name="P203"/>
      <text:p text:style-name="Standard"><text:span text:style-name="Default_20_Paragraph_20_Font"><text:span text:style-name="T3">macOS</text:span></text:span></text:p>
      <text:p text:style-name="Standard">Please check the log file in <text:span text:style-name="T58">~/Library/Application Support/sonic3air/Sonic3AIR/</text:span>. Failsafe mode should not be needed on the macOS version as all Macs should support hardware rendering.</text:p>
      <text:p text:style-name="Standard"/>
      <text:p text:style-name="P204">iOS</text:p>
      <text:p text:style-name="P205">Restart your device by <text:span text:style-name="T186">shutting it down</text:span> and turning it back on again. <text:span text:style-name="T187">The current iOS port has to load all game data into memory </text:span><text:span text:style-name="T188">at once</text:span><text:span text:style-name="T187">, so the more mods you have installed the more likely you will run into problems.</text:span></text:p>
      <text:p text:style-name="P205"/>
      <text:p text:style-name="P206">Other platforms</text:p>
      <text:p text:style-name="P207"><text:span text:style-name="T189">Try switching to the "fail-safe" mode, as described for Windows ab</text:span><text:span text:style-name="T190">o</text:span><text:span text:style-name="T189">ve.</text:span></text:p>
      <text:p text:style-name="P207"><text:span text:style-name="T189">This requires manual access to the game‘s save data folder. </text:span><text:span text:style-name="T191">Check out the respective section "Where‘</text:span><text:span text:style-name="T192">s your</text:span><text:span text:style-name="T191"> saved data" for your platform under </text:span><text:a xlink:type="simple" xlink:href="#2.Installation &amp; First Time Setup|outline" text:style-name="Internet_20_link" text:visited-style-name="Visited_20_Internet_20_Link"><text:span text:style-name="T191">Installation &amp; First Time Setup</text:span></text:a><text:span text:style-name="T191">.</text:span></text:p>
      <text:p text:style-name="P207"/>
      <text:h text:style-name="P12"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93">all</text:span><text:span text:style-name="T3"> </text:span><text:span text:style-name="Default_20_Paragraph_20_Font"><text:span text:style-name="T193">platforms</text:span></text:span>.</text:p>
      <text:p text:style-name="Standard"/>
      <text:p text:style-name="Standard">Find all the information about making your own mods in the modding PDF inside the "doc" folder.</text:p>
      <text:p text:style-name="P208"/>
      <text:p text:style-name="P208"/>
      <text:h text:style-name="Heading_20_2" text:outline-level="2"><text:bookmark-start text:name="__RefHeading___Toc2524_694512780"/><text:span text:style-name="Default_20_Paragraph_20_Font"><text:span text:style-name="T194">Where to get Mods?</text:span></text:span><text:bookmark-end text:name="__RefHeading___Toc2524_694512780"/></text:h>
      <text:p text:style-name="P209"/>
      <text:p text:style-name="P210">There‘s no official place where to get Sonic 3 A.I.R. mods.</text:p>
      <text:p text:style-name="Standard"><text:span text:style-name="Default_20_Paragraph_20_Font"><text:span text:style-name="T195">Instead, a quick search using your favorite internet search engine should find something interesting. Try searching for "sonic 3 air mods download" or similar.</text:span></text:span></text:p>
      <text:p text:style-name="P209"/>
      <text:p text:style-name="P208"/>
      <text:h text:style-name="Heading_20_2" text:outline-level="2"><text:bookmark-start text:name="__RefHeading___Toc2204_1711813851"/><text:span text:style-name="Default_20_Paragraph_20_Font"><text:span text:style-name="T194">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211"><text:span text:style-name="T196">After installation of a mod, </text:span><text:span text:style-name="T197">you can</text:span> quickly test if <text:span text:style-name="T197">it</text:span> was installed correctly and found by the game. <text:span text:style-name="T197">G</text:span>o to the "Mods" menu to see whether the mod appears there. <text:span text:style-name="T196">Close the menu and re-open it to update the mods in there. If that does not work,</text:span> restart Sonic 3 A.I.R.</text:p>
      <text:p text:style-name="P211"/>
      <text:p text:style-name="Standard"/>
      <text:p text:style-name="Standard"><text:span text:style-name="Default_20_Paragraph_20_Font"><text:span text:style-name="T3">Windows / </text:span></text:span><text:span text:style-name="Default_20_Paragraph_20_Font"><text:span text:style-name="T198">Linux</text:span></text:span></text:p>
      <text:list text:style-name="L51">
        <text:list-item>
          <text:p text:style-name="P212">Open the "mods" folder. <text:span text:style-name="T199">While Sonic 3 A.I.R. is running, right-click inside the game window to bring up a little menu. </text:span>Select "Open mods folder" there.</text:p>
        </text:list-item>
        <text:list-item>
          <text:p text:style-name="P213">Alternatively (if the above does not work <text:span text:style-name="T200">for some reason</text:span>), <text:span text:style-name="T200">access the game‘s save data folder as described in the section "Where‘s your saved data" for </text:span><text:a xlink:type="simple" xlink:href="#2.2.4.Where‘s your saved data|outline" text:style-name="Internet_20_link" text:visited-style-name="Visited_20_Internet_20_Link"><text:span text:style-name="T200">Windows</text:span></text:a><text:span text:style-name="T200"> </text:span><text:span text:style-name="T199">or</text:span><text:span text:style-name="T200"> </text:span><text:a xlink:type="simple" xlink:href="#2.4.4.Where‘s your saved data|outline" text:style-name="Internet_20_link" text:visited-style-name="Visited_20_Internet_20_Link"><text:span text:style-name="T200">Linux</text:span></text:a><text:span text:style-name="T200">. Inside there, </text:span><text:span text:style-name="T199">open</text:span><text:span text:style-name="T200"> the "mods" folder.</text:span></text:p>
        </text:list-item>
        <text:list-item>
          <text:p text:style-name="P214">If the mod follows the recommended mod structure, you <text:span text:style-name="T201">simpl</text:span><text:span text:style-name="T202">y </text:span><text:span text:style-name="T203">place</text:span> t<text:span text:style-name="T204">he </text:span><text:span text:style-name="T205">ZIP</text:span><text:span text:style-name="T204"> file</text:span> <text:span text:style-name="T204">right </text:span>in the "mods" folder<text:span text:style-name="T206"> and you're good to go.</text:span></text:p>
        </text:list-item>
        <text:list-item>
          <text:p text:style-name="P214"><draw:frame draw:style-name="fr1" draw:name="Bild1" text:anchor-type="paragraph" svg:x="1.162cm" svg:y="1.515cm" svg:width="14.889cm" style:rel-width="scale" svg:height="2.611cm" style:rel-height="scale" draw:z-index="0"><draw:image xlink:href="Pictures/10000001000002F600000085EB31024A.png" xlink:type="simple" xlink:show="embed" xlink:actuate="onLoad" draw:mime-type="image/png"/></draw:frame><text:span text:style-name="T207">But n</text:span><text:span text:style-name="T208">ote that this only works for ZIP files </text:span><text:span text:style-name="T209">- </text:span><text:span text:style-name="T208">not for RAR, 7z</text:span><text:span text:style-name="T210">, TAR.GZ, etc.</text:span><text:span text:style-name="T211"><text:line-break/></text:span><text:span text:style-name="T209">So if you </text:span><text:soft-page-break/><text:span text:style-name="T209">got a different file format</text:span>… well, <text:span text:style-name="T208">extract the </text:span><text:span text:style-name="T212">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text:span text:style-name="Default_20_Paragraph_20_Font"><text:span text:style-name="T3">macOS</text:span></text:span></text:p>
      <text:list text:style-name="L52">
        <text:list-item>
          <text:p text:style-name="P215">From the "Sonic 3 A.I.R." menu, select "Open mods folder…".</text:p>
        </text:list-item>
        <text:list-item>
          <text:p text:style-name="P215">The mods folder should open automatically.</text:p>
        </text:list-item>
        <text:list-item>
          <text:p text:style-name="P215">If the mod follows the recommended mod structure, it‘s a ZIP file that you only need to <text:span text:style-name="T213">place</text:span><text:span text:style-name="T214"> in</text:span> the "mods" folder.</text:p>
        </text:list-item>
        <text:list-item>
          <text:p text:style-name="P215">And if it doesn‘t… see the Windows section above for how a mod should look like.</text:p>
        </text:list-item>
      </text:list>
      <text:p text:style-name="Standard"/>
      <text:p text:style-name="P216"><text:span text:style-name="Default_20_Paragraph_20_Font"><text:span text:style-name="T215">Android</text:span></text:span><text:span text:style-name="Default_20_Paragraph_20_Font"><text:span text:style-name="T216"> / Web</text:span></text:span><text:span text:style-name="Default_20_Paragraph_20_Font"><text:span text:style-name="T217"> / iOS</text:span></text:span></text:p>
      <text:list text:continue-numbering="true" text:style-name="L52">
        <text:list-item>
          <text:p text:style-name="P217"><text:span text:style-name="T186">Go to the Options menu's </text:span><text:span text:style-name="T218">"</text:span><text:span text:style-name="T186">System</text:span><text:span text:style-name="T218">"</text:span><text:span text:style-name="T186"> tab, and open th</text:span><text:span text:style-name="T219">e</text:span><text:span text:style-name="T186"> File Browser ther</text:span><text:span text:style-name="T220">e.</text:span></text:p>
        </text:list-item>
        <text:list-item>
          <text:p text:style-name="P218">It will launch inside the "mods" folder, which is empty at first. This is exactly where mods are supposed to be placed.</text:p>
        </text:list-item>
        <text:list-item>
          <text:p text:style-name="P218">Use the "Import file..." button at the top to import a mod in <text:span text:style-name="T221">ZIP</text:span> file form.</text:p>
        </text:list-item>
        <text:list-item>
          <text:p text:style-name="P219"><text:span text:style-name="T222">I</text:span><text:span text:style-name="T223">n case</text:span><text:span text:style-name="T222"> </text:span><text:span text:style-name="T223">the</text:span><text:span text:style-name="T222"> mod </text:span><text:span text:style-name="T223">file</text:span><text:span text:style-name="T222"> is not a ZIP - </text:span><text:span text:style-name="T224">but a RAR or 7z or other archive file -</text:span><text:span text:style-name="T222">, you need to </text:span><text:span text:style-name="T225">first</text:span><text:span text:style-name="T222"> repackage it as a ZIP, which is best done on a PC or Mac and possibly requires additional software </text:span><text:span text:style-name="T223">(</text:span><text:span text:style-name="T226">like </text:span><text:a xlink:type="simple" xlink:href="https://www.7-zip.org/" text:style-name="Internet_20_link" text:visited-style-name="Visited_20_Internet_20_Link"><text:span text:style-name="T226">7zip</text:span></text:a><text:span text:style-name="T223">)</text:span><text:span text:style-name="T226"> </text:span><text:span text:style-name="T222">that can open the mod file.</text:span></text:p>
        </text:list-item>
      </text:list>
      <text:p text:style-name="P220"/>
      <text:p text:style-name="P221"/>
      <text:h text:style-name="P222" text:outline-level="2"><text:bookmark-start text:name="__RefHeading___Toc2204_17118138511"/><text:span text:style-name="Default_20_Paragraph_20_Font"><text:span text:style-name="T194">Mod</text:span></text:span><text:span text:style-name="Default_20_Paragraph_20_Font"><text:span text:style-name="T227"> Option</text:span></text:span><text:span text:style-name="Default_20_Paragraph_20_Font"><text:span text:style-name="T194">s</text:span></text:span><text:bookmark-end text:name="__RefHeading___Toc2204_17118138511"/></text:h>
      <text:p text:style-name="P223"><text:span text:style-name="Default_20_Paragraph_20_Font"><text:span text:style-name="T194"/></text:span></text:p>
      <text:p text:style-name="P224"><text:span text:style-name="T228">Many</text:span> mods feature their own set of settings. You can find them in the "Mods" tab of the Options menu - it's left of the "System" tab.</text:p>
      <text:p text:style-name="P224">Note that this tab will only appear if there's any mod options at all, and show only the options of mods that are activated in the Mods menu.</text:p>
      <text:p text:style-name="P223"/>
      <text:p text:style-name="P223"/>
      <text:p text:style-name="P223"/>
      <text:h text:style-name="P12" text:outline-level="1"><text:bookmark-start text:name="__RefHeading___Toc1662_1429397617"/>About this Fan Game<text:span text:style-name="T229"> Remaster</text:span><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230">G</text:span></text:span><text:span text:style-name="Default_20_Paragraph_20_Font"><text:span text:style-name="T3"> Spindash</text:span></text:span>.</text:p>
      <text:p text:style-name="Standard">Ported to macOS <text:span text:style-name="T231">and</text:span> <text:span text:style-name="T231">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225"><text:span text:style-name="T232">Ported to PS Vita by </text:span><text:span text:style-name="T3">gl33ntwine</text:span><text:span text:style-name="T232">, </text:span><text:span text:style-name="T3">Rinnegatamante</text:span><text:span text:style-name="T232"> and </text:span><text:span text:style-name="T3">MDashK</text:span><text:span text:style-name="T232">.</text:span></text:p>
      <text:p text:style-name="P226"><text:span text:style-name="T233">S</text:span>cript<text:span text:style-name="T233"> improvements</text:span> <text:span text:style-name="T233">contributed </text:span>by <text:span text:style-name="T234">Vinegar</text:span><text:span text:style-name="T235"> (</text:span><text:a xlink:type="simple" xlink:href="https://github.com/vinegar97/sonic3air" text:style-name="Internet_20_link" text:visited-style-name="Visited_20_Internet_20_Link"><text:span text:style-name="T233">Github </text:span><text:span text:style-name="T235">fork</text:span></text:a><text:span text:style-name="T235">)</text:span><text:span text:style-name="T233">.</text:span></text:p>
      <text:p text:style-name="P227"/>
      <text:p text:style-name="Standard">Using content from <text:span text:style-name="Default_20_Paragraph_20_Font"><text:span text:style-name="T53">Sonic 3 &amp; Knuckles</text:span></text:span> by <text:span text:style-name="Default_20_Paragraph_20_Font"><text:span text:style-name="T3">Sonic Team®</text:span></text:span>.</text:p>
      <text:p text:style-name="Standard">Plus the original <text:span text:style-name="Default_20_Paragraph_20_Font"><text:span text:style-name="T55">Sonic 2 Super Sonic Theme</text:span></text:span> and <text:span text:style-name="Default_20_Paragraph_20_Font"><text:span text:style-name="T55">Boss Music from Sonic 1 &amp; 2</text:span></text:span> by <text:span text:style-name="Default_20_Paragraph_20_Font"><text:span text:style-name="T3">Masato Nakamura</text:span></text:span>.</text:p>
      <text:p text:style-name="Standard"/>
      <text:p text:style-name="Standard">Additional credits go to:</text:p>
      <text:list text:style-name="L53">
        <text:list-item>
          <text:p text:style-name="P228"><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236">A</text:span></text:span></text:a><text:span text:style-name="Default_20_Paragraph_20_Font"><text:span text:style-name="T236">nimation Editor</text:span></text:span></text:p>
        </text:list-item>
        <text:list-item>
          <text:p text:style-name="P228"><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29"><text:span text:style-name="Default_20_Paragraph_20_Font"><text:span text:style-name="T3">Hyllian</text:span></text:span> for the xBRZ pixel filter<text:span text:style-name="T237">, as well as </text:span><text:span text:style-name="T238">Maxim Stepin</text:span><text:span text:style-name="T239">, </text:span><text:span text:style-name="T238">Cameron Zemek</text:span><text:span text:style-name="T239"> and </text:span><text:span text:style-name="T238">Jules Blok</text:span><text:span text:style-name="T237"> for the HQx filters</text:span></text:p>
        </text:list-item>
        <text:list-item>
          <text:p text:style-name="P230"><text:span text:style-name="T3">Sewer56</text:span> for contributing frame pacing improvements (<text:a xlink:type="simple" xlink:href="https://github.com/Sewer56/sonic3air" text:style-name="Internet_20_link" text:visited-style-name="Visited_20_Internet_20_Link"><text:span text:style-name="T240">Github </text:span>fork</text:a>)</text:p>
        </text:list-item>
        <text:list-item>
          <text:p text:style-name="P231">Not to mentioned the <text:span text:style-name="T3">many script </text:span><text:span text:style-name="T241">and code </text:span><text:span text:style-name="T3">contributors</text:span> - see the <text:a xlink:type="simple" xlink:href="https://github.com/Eukaryot/sonic3air#readme" text:style-name="Internet_20_link" text:visited-style-name="Visited_20_Internet_20_Link"><text:span text:style-name="T242">R</text:span>eadme</text:a> on Github!</text:p>
        </text:list-item>
      </text:list>
      <text:p text:style-name="Standard"/>
      <text:p text:style-name="Standard">Special thanks to:</text:p>
      <text:list text:continue-numbering="true" text:style-name="L53">
        <text:list-item>
          <text:p text:style-name="P228"><text:span text:style-name="Default_20_Paragraph_20_Font"><text:span text:style-name="T243">Liliam</text:span></text:span><text:span text:style-name="Default_20_Paragraph_20_Font"><text:span text:style-name="T3"> Bronze</text:span></text:span> for sharing lots of interesting technical insights in <text:span text:style-name="T244">their</text:span> <text:a xlink:type="simple" xlink:href="https://s3unlocked.blogspot.com/" office:target-frame-name="_top" xlink:show="replace" text:style-name="Internet_20_link" text:visited-style-name="Visited_20_Internet_20_Link">Sonic 3 Unlocked</text:a> blog</text:p>
        </text:list-item>
        <text:list-item>
          <text:p text:style-name="P228"><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8"><text:span text:style-name="Default_20_Paragraph_20_Font"><text:span text:style-name="T3">ValleyBell</text:span></text:span> for his research and software on Genesis / Mega Drive music</text:p>
        </text:list-item>
        <text:list-item>
          <text:p text:style-name="P228">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32"><text:span text:style-name="T245">A special shoutout</text:span><text:span text:style-name="T246"> </text:span><text:span text:style-name="T245">to </text:span><text:span text:style-name="T246">the </text:span>Sonic 3 / Sonic &amp; Knuckles <text:a xlink:type="simple" xlink:href="https://github.com/sonicretro/skdisasm" text:style-name="Internet_20_link" text:visited-style-name="Visited_20_Internet_20_Link">Disassembly</text:a><text:span text:style-name="T246"> </text:span><text:span text:style-name="T245">and its contributor</text:span><text:span text:style-name="T247">s</text:span><text:span text:style-name="T245">, as this has</text:span><text:span text:style-name="T246"> be</text:span><text:span text:style-name="T245">en</text:span><text:span text:style-name="T246"> a valuable resource </text:span><text:span text:style-name="T245">during th</text:span><text:span text:style-name="T247">e</text:span><text:span text:style-name="T245"> initial game script conversion and debugging</text:span></text:p>
        </text:list-item>
        <text:list-item>
          <text:p text:style-name="P228"><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8"><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8">And everyone else supporting this project on <text:span text:style-name="T246">Bluesky, </text:span>Twitter<text:span text:style-name="T248">, Discord</text:span><text:span text:style-name="T249">, the community forums</text:span> and other media by giving feedback and reporting bug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lef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fo:hyphenation-keep="auto" loext:hyphenation-keep-type="column" loext:hyphenation-keep-line="false"/>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loext:hyphenation-keep-line="false"/>
      <style:text-properties fo:font-size="10.5pt" style:font-size-asian="10.5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42cm" fo:margin-bottom="0.21cm" style:contextual-spacing="false" fo:hyphenation-ladder-count="no-limit" fo:hyphenation-keep="auto" loext:hyphenation-keep-type="column" loext:hyphenation-keep-line="false"/>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chapter" style:master-page-name="">
      <style:paragraph-properties fo:hyphenation-ladder-count="no-limit" fo:hyphenation-keep="auto" loext:hyphenation-keep-type="column" loext:hyphenation-keep-line="false"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top="0.3cm" fo:margin-bottom="0.101cm" style:contextual-spacing="false"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hyphenation-keep="auto" loext:hyphenation-keep-type="column" loext:hyphenation-keep-line="false" fo:text-indent="0cm" style:auto-text-indent="false">
        <style:tab-stops>
          <style:tab-stop style:position="16.501cm" style:type="right" style:leader-style="dotted" style:leader-text="."/>
        </style:tab-stops>
      </style:paragraph-properties>
      <style:text-properties fo:font-size="10pt" fo:hyphenate="false" loext:hyphenation-no-caps="false" loext:hyphenation-no-last-word="false" loext:hyphenation-word-char-count="no-limit" loext:hyphenation-zone="no-limit"/>
    </style:style>
    <style:style style:name="Verzeichniseintrag" style:family="paragraph" style:parent-style-name="Heading">
      <style:paragraph-properties fo:margin-top="0.101cm" fo:margin-bottom="0cm" style:contextual-spacing="false" fo:line-height="125%" fo:hyphenation-ladder-count="no-limit" fo:hyphenation-keep="auto" loext:hyphenation-keep-type="column" loext:hyphenation-keep-line="false"/>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Verzeichnis-Unterpunkt" style:family="paragraph" style:parent-style-name="Verzeichniseintrag">
      <style:paragraph-properties fo:line-height="120%" fo:hyphenation-ladder-count="no-limit" fo:hyphenation-keep="auto" loext:hyphenation-keep-type="column" loext:hyphenation-keep-line="false"/>
      <style:text-properties fo:font-size="9pt" style:font-size-asian="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meta:creation-date>2021-10-19T20:34:53.511000000</meta:creation-date>
    <meta:editing-cycles>94</meta:editing-cycles>
    <meta:editing-duration>PT2H28M29S</meta:editing-duration>
    <dc:date>2026-06-28T09:56:08.520083900</dc:date>
    <meta:print-date>2026-06-28T09:55:33.905449000</meta:print-date>
    <meta:printed-by>PDF-Dateien</meta:printed-by>
    <meta:document-statistic meta:table-count="1" meta:image-count="5" meta:object-count="0" meta:page-count="25" meta:paragraph-count="585" meta:word-count="8281" meta:character-count="46386" meta:non-whitespace-character-count="38896"/>
    <meta:template xlink:type="simple" xlink:actuate="onRequest" xlink:title="" xlink:href="Normal.dotm"/>
  </office:meta>
</office:document-meta>
</file>